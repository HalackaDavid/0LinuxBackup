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automatic-styles>
    <style:style style:name="Table1" style:family="table">
      <style:table-properties style:width="5.7035in" fo:margin-top="0in" fo:margin-bottom="0in" table:align="center" style:writing-mode="page"/>
    </style:style>
    <style:style style:name="Table1.A" style:family="table-column">
      <style:table-column-properties style:column-width="1.0549in"/>
    </style:style>
    <style:style style:name="Table1.B" style:family="table-column">
      <style:table-column-properties style:column-width="1.3264in"/>
    </style:style>
    <style:style style:name="Table1.C" style:family="table-column">
      <style:table-column-properties style:column-width="3.3222in"/>
    </style:style>
    <style:style style:name="Table1.1" style:family="table-row">
      <style:table-row-properties style:min-row-height="0.7875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2" style:family="table-row">
      <style:table-row-properties style:min-row-height="1.1813in" fo:keep-together="auto"/>
    </style:style>
    <style:style style:name="Table1.A2" style:family="table-cell">
      <style:table-cell-properties fo:padding-left="0.075in" fo:padding-right="0.075in" fo:padding-top="0in" fo:padding-bottom="0in" fo:border="0.5pt solid #000000"/>
    </style:style>
    <style:style style:name="Table1.B2" style:family="table-cell">
      <style:table-cell-properties fo:padding-left="0.075in" fo:padding-right="0.075in" fo:padding-top="0in" fo:padding-bottom="0in" fo:border="0.5pt solid #000000"/>
    </style:style>
    <style:style style:name="Table1.C2" style:family="table-cell">
      <style:table-cell-properties fo:padding-left="0.075in" fo:padding-right="0.075in" fo:padding-top="0in" fo:padding-bottom="0in" fo:border="0.5pt solid #000000"/>
    </style:style>
    <style:style style:name="Table1.A3" style:family="table-cell">
      <style:table-cell-properties fo:padding-left="0.075in" fo:padding-right="0.075in" fo:padding-top="0in" fo:padding-bottom="0in" fo:border="0.5pt solid #000000"/>
    </style:style>
    <style:style style:name="Table1.B3" style:family="table-cell">
      <style:table-cell-properties fo:padding-left="0.075in" fo:padding-right="0.075in" fo:padding-top="0in" fo:padding-bottom="0in" fo:border="0.5pt solid #000000"/>
    </style:style>
    <style:style style:name="Table1.C3" style:family="table-cell">
      <style:table-cell-properties fo:padding-left="0.075in" fo:padding-right="0.075in" fo:padding-top="0in" fo:padding-bottom="0in" fo:border="0.5pt solid #000000"/>
    </style:style>
    <style:style style:name="Table1.A4" style:family="table-cell">
      <style:table-cell-properties fo:padding-left="0.075in" fo:padding-right="0.075in" fo:padding-top="0in" fo:padding-bottom="0in" fo:border="0.5pt solid #000000"/>
    </style:style>
    <style:style style:name="Table1.B4" style:family="table-cell">
      <style:table-cell-properties fo:padding-left="0.075in" fo:padding-right="0.075in" fo:padding-top="0in" fo:padding-bottom="0in" fo:border="0.5pt solid #000000"/>
    </style:style>
    <style:style style:name="Table1.C4" style:family="table-cell">
      <style:table-cell-properties fo:padding-left="0.075in" fo:padding-right="0.075in" fo:padding-top="0in" fo:padding-bottom="0in" fo:border="0.5pt solid #000000"/>
    </style:style>
    <style:style style:name="Table1.A5" style:family="table-cell">
      <style:table-cell-properties fo:padding-left="0.075in" fo:padding-right="0.075in" fo:padding-top="0in" fo:padding-bottom="0in" fo:border="0.5pt solid #000000"/>
    </style:style>
    <style:style style:name="Table1.B5" style:family="table-cell">
      <style:table-cell-properties fo:padding-left="0.075in" fo:padding-right="0.075in" fo:padding-top="0in" fo:padding-bottom="0in" fo:border="0.5pt solid #000000"/>
    </style:style>
    <style:style style:name="Table1.C5" style:family="table-cell">
      <style:table-cell-properties fo:padding-left="0.075in" fo:padding-right="0.075in" fo:padding-top="0in" fo:padding-bottom="0in" fo:border="0.5pt solid #000000"/>
    </style:style>
    <style:style style:name="Table1.A6" style:family="table-cell">
      <style:table-cell-properties fo:padding-left="0.075in" fo:padding-right="0.075in" fo:padding-top="0in" fo:padding-bottom="0in" fo:border="0.5pt solid #000000"/>
    </style:style>
    <style:style style:name="Table1.B6" style:family="table-cell">
      <style:table-cell-properties fo:padding-left="0.075in" fo:padding-right="0.075in" fo:padding-top="0in" fo:padding-bottom="0in" fo:border="0.5pt solid #000000"/>
    </style:style>
    <style:style style:name="Table1.C6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left="1.7102in" fo:margin-top="0in" fo:margin-bottom="0.1626in" style:contextual-spacing="false" fo:line-height="100%" fo:text-indent="-0.7783in" style:auto-text-indent="false"/>
    </style:style>
    <style:style style:name="P2" style:family="paragraph" style:parent-style-name="Standard">
      <style:paragraph-properties fo:margin-left="-0.0091in" fo:margin-right="-0.6291in" fo:margin-top="0in" fo:margin-bottom="0.0783in" style:contextual-spacing="false" fo:keep-with-next="always"/>
    </style:style>
    <style:style style:name="P3" style:family="paragraph" style:parent-style-name="Standard">
      <style:paragraph-properties fo:margin-left="-0.0075in" fo:margin-right="-0.6299in" fo:margin-top="0in" fo:margin-bottom="0in" style:contextual-spacing="false" fo:text-align="center" style:justify-single-word="false"/>
    </style:style>
    <style:style style:name="P4" style:family="paragraph" style:parent-style-name="Standard">
      <style:paragraph-properties fo:margin-top="0in" fo:margin-bottom="0.078in" style:contextual-spacing="false"/>
      <style:text-properties style:font-name="Times New Roman1" fo:font-size="12pt" style:font-name-asian="Times New Roman2" style:font-size-asian="12pt" style:font-name-complex="Times New Roman2"/>
    </style:style>
    <style:style style:name="P5" style:family="paragraph" style:parent-style-name="Standard">
      <style:paragraph-properties fo:margin-left="-0.0035in" fo:margin-top="0in" fo:margin-bottom="0.0799in" style:contextual-spacing="false" fo:text-indent="-0.0071in" style:auto-text-indent="false">
        <style:tab-stops>
          <style:tab-stop style:position="2.3626in"/>
        </style:tab-stops>
      </style:paragraph-properties>
    </style:style>
    <style:style style:name="P6" style:family="paragraph" style:parent-style-name="Standard">
      <style:paragraph-properties fo:margin-top="0in" fo:margin-bottom="0.078in" style:contextual-spacing="false">
        <style:tab-stops>
          <style:tab-stop style:position="2.3626in"/>
        </style:tab-stops>
      </style:paragraph-properties>
      <style:text-properties style:font-name="Times New Roman1" fo:font-size="12pt" style:font-name-asian="Times New Roman2" style:font-size-asian="12pt" style:font-name-complex="Times New Roman2"/>
    </style:style>
    <style:style style:name="P7" style:family="paragraph" style:parent-style-name="Standard">
      <style:paragraph-properties>
        <style:tab-stops>
          <style:tab-stop style:position="2.3626in"/>
        </style:tab-stops>
      </style:paragraph-properties>
      <style:text-properties style:font-name="Times New Roman1" fo:font-size="12pt" style:font-name-asian="Times New Roman2" style:font-size-asian="12pt" style:font-name-complex="Times New Roman2"/>
    </style:style>
    <style:style style:name="P8" style:family="paragraph" style:parent-style-name="Standard">
      <style:paragraph-properties fo:margin-top="0in" fo:margin-bottom="0.0799in" style:contextual-spacing="false">
        <style:tab-stops>
          <style:tab-stop style:position="2.3626in"/>
        </style:tab-stops>
      </style:paragraph-properties>
      <style:text-properties style:font-name="Times New Roman1" fo:font-size="12pt" style:font-name-asian="Times New Roman2" style:font-size-asian="12pt" style:font-name-complex="Times New Roman2"/>
    </style:style>
    <style:style style:name="P9" style:family="paragraph" style:parent-style-name="Standard">
      <style:paragraph-properties fo:margin-right="5.3264in" fo:margin-top="0in" fo:margin-bottom="0.0016in" style:contextual-spacing="false" fo:line-height="148%">
        <style:tab-stops>
          <style:tab-stop style:position="2.3626in"/>
        </style:tab-stops>
      </style:paragraph-properties>
      <style:text-properties style:font-name="Times New Roman1" fo:font-size="12pt" style:font-name-asian="Times New Roman2" style:font-size-asian="12pt" style:font-name-complex="Times New Roman2"/>
    </style:style>
    <style:style style:name="P10" style:family="paragraph" style:parent-style-name="Standard">
      <style:paragraph-properties fo:margin-left="-0.0035in" fo:margin-top="0in" fo:margin-bottom="0.0799in" style:contextual-spacing="false" fo:text-indent="-0.0071in" style:auto-text-indent="false">
        <style:tab-stops>
          <style:tab-stop style:position="2.3626in"/>
        </style:tab-stops>
      </style:paragraph-properties>
      <style:text-properties style:font-name="Times New Roman1" fo:font-size="12pt" fo:font-weight="bold" style:font-name-asian="Times New Roman2" style:font-size-asian="12pt" style:font-weight-asian="bold" style:font-name-complex="Times New Roman2"/>
    </style:style>
    <style:style style:name="P11" style:family="paragraph" style:parent-style-name="Standard">
      <style:paragraph-properties fo:margin-left="-0.0102in" fo:margin-top="0in" fo:margin-bottom="0.0799in" style:contextual-spacing="false" fo:text-indent="0in" style:auto-text-indent="false">
        <style:tab-stops>
          <style:tab-stop style:position="2.3626in"/>
        </style:tab-stops>
      </style:paragraph-properties>
      <style:text-properties style:font-name="Times New Roman1" fo:font-size="12pt" fo:font-weight="bold" officeooo:rsid="000d03e6" officeooo:paragraph-rsid="000d03e6" style:font-name-asian="Times New Roman2" style:font-size-asian="12pt" style:font-weight-asian="bold" style:font-name-complex="Times New Roman2"/>
    </style:style>
    <style:style style:name="P12" style:family="paragraph" style:parent-style-name="myHeader1">
      <style:text-properties officeooo:paragraph-rsid="000c2e6e"/>
    </style:style>
    <style:style style:name="P13" style:family="paragraph" style:parent-style-name="myContent">
      <style:text-properties officeooo:paragraph-rsid="000c2e6e"/>
    </style:style>
    <style:style style:name="P14" style:family="paragraph" style:parent-style-name="myHeader1">
      <style:paragraph-properties fo:break-before="page"/>
      <style:text-properties fo:font-size="16pt" officeooo:rsid="0021719c" officeooo:paragraph-rsid="000c2e6e" style:font-size-asian="16pt" style:font-size-complex="16pt"/>
    </style:style>
    <style:style style:name="P15" style:family="paragraph" style:parent-style-name="myContent">
      <style:text-properties officeooo:rsid="0012e5da" officeooo:paragraph-rsid="0012e5da"/>
    </style:style>
    <style:style style:name="P16" style:family="paragraph" style:parent-style-name="myContent" style:list-style-name="L1">
      <style:text-properties officeooo:paragraph-rsid="000c2e6e"/>
    </style:style>
    <style:style style:name="P17" style:family="paragraph" style:parent-style-name="myContent">
      <style:text-properties officeooo:rsid="0021d201" officeooo:paragraph-rsid="0021d201"/>
    </style:style>
    <style:style style:name="P18" style:family="paragraph" style:parent-style-name="myHeader1">
      <style:paragraph-properties fo:break-before="page"/>
      <style:text-properties officeooo:paragraph-rsid="000c2e6e"/>
    </style:style>
    <style:style style:name="P19" style:family="paragraph" style:parent-style-name="myContent">
      <style:text-properties officeooo:paragraph-rsid="001dde51"/>
    </style:style>
    <style:style style:name="P20" style:family="paragraph" style:parent-style-name="myContent" style:list-style-name="L2">
      <style:text-properties officeooo:paragraph-rsid="000c2e6e"/>
    </style:style>
    <style:style style:name="P21" style:family="paragraph" style:parent-style-name="myContent" style:list-style-name="L3">
      <style:text-properties officeooo:paragraph-rsid="000c2e6e"/>
    </style:style>
    <style:style style:name="P22" style:family="paragraph" style:parent-style-name="myContent">
      <style:text-properties officeooo:paragraph-rsid="001e3553"/>
    </style:style>
    <style:style style:name="P23" style:family="paragraph" style:parent-style-name="myContent">
      <style:text-properties officeooo:paragraph-rsid="00203477"/>
    </style:style>
    <style:style style:name="P24" style:family="paragraph" style:parent-style-name="myContent">
      <style:paragraph-properties fo:break-before="page"/>
      <style:text-properties officeooo:paragraph-rsid="000c2e6e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Calibri" fo:font-size="11pt" fo:language="cs" fo:country="CZ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28" style:family="paragraph" style:parent-style-name="Standard">
      <style:paragraph-properties fo:margin-top="0in" fo:margin-bottom="0in" style:contextual-spacing="false" fo:line-height="100%"/>
      <style:text-properties style:font-name="Calibri1" fo:font-size="11pt" fo:language="cs" fo:country="CZ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1" style:family="text">
      <style:text-properties style:font-name="Times New Roman1" fo:font-size="12pt" fo:font-weight="bold" style:font-name-asian="Times New Roman2" style:font-size-asian="12pt" style:font-weight-asian="bold" style:font-name-complex="Times New Roman2"/>
    </style:style>
    <style:style style:name="T2" style:family="text">
      <style:text-properties style:font-name="Times New Roman1" fo:font-size="16pt" fo:font-weight="bold" style:font-name-asian="Times New Roman2" style:font-size-asian="16pt" style:font-weight-asian="bold" style:font-name-complex="Times New Roman2" style:font-size-complex="16pt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color="#92d050" loext:opacity="100%"/>
    </style:style>
    <style:style style:name="T5" style:family="text">
      <style:text-properties style:font-name="Times New Roman1" fo:font-size="12pt" style:font-name-asian="Times New Roman2" style:font-size-asian="12pt" style:font-name-complex="Times New Roman2"/>
    </style:style>
    <style:style style:name="T6" style:family="text">
      <style:text-properties fo:color="#000000" loext:opacity="100%" style:font-name="Times New Roman1" fo:font-size="12pt" officeooo:rsid="000d03e6" style:font-name-asian="Times New Roman2" style:font-size-asian="12pt" style:font-name-complex="Times New Roman2"/>
    </style:style>
    <style:style style:name="T7" style:family="text">
      <style:text-properties officeooo:rsid="00312f34"/>
    </style:style>
    <style:style style:name="T8" style:family="text">
      <style:text-properties officeooo:rsid="002f6a2c"/>
    </style:style>
    <style:style style:name="T9" style:family="text">
      <style:text-properties officeooo:rsid="002810fc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officeooo:rsid="000ff869"/>
    </style:style>
    <style:style style:name="T12" style:family="text">
      <style:text-properties officeooo:rsid="0017452f"/>
    </style:style>
    <style:style style:name="T13" style:family="text">
      <style:text-properties officeooo:rsid="001a3658"/>
    </style:style>
    <style:style style:name="T14" style:family="text">
      <style:text-properties officeooo:rsid="001b9e9d"/>
    </style:style>
    <style:style style:name="T15" style:family="text">
      <style:text-properties officeooo:rsid="001dde51"/>
    </style:style>
    <style:style style:name="T16" style:family="text">
      <style:text-properties officeooo:rsid="00203477"/>
    </style:style>
    <style:style style:name="T17" style:family="text">
      <style:text-properties officeooo:rsid="002087fd"/>
    </style:style>
    <style:style style:name="T18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19" style:family="text">
      <style:text-properties style:font-name="Times New Roman1" fo:font-size="14pt" style:font-size-asian="14pt" style:font-name-complex="Times New Roman2" style:font-size-complex="14pt"/>
    </style:style>
    <style:style style:name="T20" style:family="text">
      <style:text-properties style:font-name="Times New Roman1" fo:font-size="12pt" fo:font-weight="bold" style:font-size-asian="12pt" style:font-weight-asian="bold" style:font-name-complex="Times New Roman2" style:font-size-complex="12pt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VOŠ, Obchodní akademie a SZŠ v Domažlicích, Erbenova 184 obor: <text:s/>18-20-M/01 <text:s/>Informační technologie</text:span><text:span text:style-name="T1"/></text:p>
      <text:p text:style-name="P2"><text:line-break/><text:line-break/><text:line-break/><text:line-break/><text:line-break/><text:line-break/><text:line-break/><text:line-break/><text:line-break/><text:line-break/><text:line-break/></text:p>
      <text:p text:style-name="Caption"/>
      <text:p text:style-name="P3" loext:marker-style-name="T2"><text:span text:style-name="T2">Zpráva z odborné praxe</text:span><text:span text:style-name="T2"/></text:p>
      <text:p text:style-name="P3" loext:marker-style-name="T3"><text:span text:style-name="T2">2024/2025<text:line-break/><text:line-break/><text:line-break/><text:line-break/><text:line-break/><text:line-break/><text:line-break/><text:line-break/><text:line-break/></text:span><text:span text:style-name="T2"/></text:p>
      <text:p text:style-name="P4"><text:s/></text:p>
      <text:p text:style-name="P5" loext:marker-style-name="T4"><text:span text:style-name="T5">Místo konání: <text:tab/></text:span><text:span text:style-name="T6">obecní úřad Česeká Kubice</text:span></text:p>
      <text:p text:style-name="P6"><text:s/></text:p>
      <text:p text:style-name="P5"><text:span text:style-name="T5">Vedoucí praxe na pracovišti: <text:tab/></text:span><text:span text:style-name="T6">radek Gerberg</text:span></text:p>
      <text:p text:style-name="P7"><text:s/></text:p>
      <text:p text:style-name="P8">Vedoucí učitel praxe: <text:s/><text:tab/>Ing. Jindra Mastná</text:p>
      <text:p text:style-name="P6"><text:s/></text:p>
      <text:p text:style-name="P5" loext:marker-style-name="T4"><text:span text:style-name="T5">Zpracoval: <text:tab/></text:span><text:span text:style-name="T6">David Halačka</text:span></text:p>
      <text:p text:style-name="P9"><text:s text:c="2"/></text:p>
      <text:p text:style-name="P5"><text:span text:style-name="T5">Klasifikace:</text:span><text:span text:style-name="T1"> </text:span></text:p>
      <text:p text:style-name="P10"/>
      <text:p text:style-name="P11"><text:soft-page-break/></text:p>
      <text:p text:style-name="P12"><text:span text:style-name="T7">1.</text:span><text:span text:style-name="T8"> </text:span>Charakteristika organizace</text:p>
      <text:p text:style-name="P13"/>
      <text:p text:style-name="P13">Odbornou praxi jsem vykonával na obecním úřadě Obec Česká Kubice. Jedná se o malou obec v Plzeňském kraji <text:span text:style-name="T9">okresu Domažlice</text:span>, která zajišťuje základní služby a stará se o chod pro obyvatele <text:span text:style-name="T9">České Kubice, Folmavy, Spálence</text:span>.</text:p>
      <text:p text:style-name="P13"/>
      <text:p text:style-name="P13">Na první pohled je vidět, že nejde o velkou organizaci, ale právě to má svoje výhody. Lidé se navzájem znají a práce je <text:span text:style-name="T10">více </text:span><text:span text:style-name="T11">odlišná</text:span>. Zaměstnanci často nedělají jen jednu konkrétní věc, ale řeší více úkolů najednou.</text:p>
      <text:p text:style-name="P13"/>
      <text:p text:style-name="P13">V čele je starosta Radek Gerberg, kterému pomáh<text:span text:style-name="T9">ají</text:span> místostarost<text:span text:style-name="T9">ové</text:span> David Kohel <text:span text:style-name="T9">a Radek Strádal</text:span>. Dále zde pracují administrativní pracovníci, účetní <text:span text:style-name="T12">Jana Baarová </text:span>a další zaměstnanci <text:span text:style-name="T12">např. Ondřej Bolovanský</text:span>, kteří se starají například o údržbu obce.</text:p>
      <text:p text:style-name="P14">2. Písemná agenda</text:p>
      <text:p text:style-name="P13"/>
      <text:p text:style-name="P13">Velkou část práce na úřadě tvoří práce s dokumenty. Každý den přichází nové žádosti, zprávy nebo úřední dokumenty, které je potřeba zpracovat.</text:p>
      <text:p text:style-name="P13"/>
      <text:p text:style-name="P15">Mezi které patří</text:p>
      <text:list text:style-name="L1">
        <text:list-item>
          <text:p text:style-name="P16">žádostmi od občanů</text:p>
        </text:list-item>
        <text:list-item>
          <text:p text:style-name="P16">úředními dopisy</text:p>
        </text:list-item>
        <text:list-item>
          <text:p text:style-name="P16">smlouvami</text:p>
        </text:list-item>
        <text:list-item>
          <text:p text:style-name="P16">interními dokumenty</text:p>
        </text:list-item>
      </text:list>
      <text:p text:style-name="P13"/>
      <text:p text:style-name="P13">Dokumenty se evid<text:span text:style-name="T13">ují </text:span><text:span text:style-name="T14">v papírové formě</text:span>, tříd<text:span text:style-name="T13">í</text:span> <text:span text:style-name="T14">se </text:span>a archiv<text:span text:style-name="T13">ují podle roku poté podle </text:span><text:span text:style-name="T14">kategorie </text:span><text:span text:style-name="T13">a nakonec </text:span><text:span text:style-name="T14">čísla </text:span><text:span text:style-name="T13">a odkládají se na místo</text:span> <text:span text:style-name="T13">které je přehledné a hlavně </text:span>aby se dal kdykoliv dohledat <text:span text:style-name="T14">v tomto případě na polici</text:span>. </text:p>
      <text:p text:style-name="P13"/>
      <text:p text:style-name="P13">Měl jsem možnost si některé činnosti vyzkoušet, hlavně jednodušší práci s dokumenty a jejich třídění. <text:span text:style-name="T13">Moje hlavní činos spočívala v skenování dokume</text:span><text:span text:style-name="T14">n</text:span><text:span text:style-name="T13">tů do počítače a archivaci na vzdálenou datovou jednotku. </text:span><text:span text:style-name="T14">Také jsem dostal za úkol zjistit jak přidat dva pdf soubory do sebe a dalšími menšími většinou techickými problémy s počítačem.</text:span></text:p>
      <text:p text:style-name="P13"/>
      <text:p text:style-name="P17"/>
      <text:p text:style-name="P13"/>
      <text:p text:style-name="P18">3. Účetnictví a hospodaření</text:p>
      <text:p text:style-name="P19"><text:line-break/><text:line-break/>Během praxe jsem měl možnost nahlédnout i do oblasti účetnictví a hospodaření obce.</text:p>
      <text:p text:style-name="P13"/>
      <text:p text:style-name="P13">Dozvěděl jsem se, že příjmy obce tvoří hlavně:</text:p>
      <text:list text:style-name="L2">
        <text:list-item>
          <text:p text:style-name="P20">daně</text:p>
        </text:list-item>
        <text:list-item>
          <text:p text:style-name="P20">různé dotace</text:p>
        </text:list-item>
        <text:list-item>
          <text:p text:style-name="P20">poplatky od občanů</text:p>
        </text:list-item>
      </text:list>
      <text:p text:style-name="P13"/>
      <text:p text:style-name="P13"><text:span text:style-name="T15">Tyto </text:span>peníze se používají například na:</text:p>
      <text:list text:style-name="L3">
        <text:list-item>
          <text:p text:style-name="P21">opravy silnic</text:p>
        </text:list-item>
        <text:list-item>
          <text:p text:style-name="P21">veřejné osvětlení</text:p>
        </text:list-item>
        <text:list-item>
          <text:p text:style-name="P21">platy zaměstnanců</text:p>
        </text:list-item>
        <text:list-item>
          <text:p text:style-name="P21">kulturní akce</text:p>
        </text:list-item>
      </text:list>
      <text:p text:style-name="P13"/>
      <text:p text:style-name="P22">Měl jsem možnost nahlédnout do základních účetních dokladů a vidět, jak se evidují příjmy a výdaje. Překvapilo mě, kolik věcí se musí zapisovat a kontrolovat. Zjistil jsem, že účetnictví není jen o číslech, ale hlavně o přehledu a zodpovědnosti.</text:p>
      <text:p text:style-name="P19"><text:line-break/>Zaujalo mě také plánování rozpočtu. Obec musí dopředu počítat s tím, kolik peněz bude mít a jak je využije <text:span text:style-name="T15">také jsem se dozvěděl že peníze z dotací nepřichází na začátku roku ale průběžně v částkách sta tisíců.</text:span></text:p>
      <text:p text:style-name="P18">4. Mzdy</text:p>
      <text:p text:style-name="P23"/>
      <text:p text:style-name="P23">Během praxe jsem se seznámil se základním fungováním <text:span text:style-name="T16">mezd</text:span> na obecním úřadě. I když jsem se na jejím zpracování nepodílel, bylo mi vysvětleno, jak celý systém funguje a co všechno zahrnuje.</text:p>
      <text:p text:style-name="P13"/>
      <text:p text:style-name="P13">Na úřadě je odměňování zaměstnanců řízeno tzv. platovým řádem. Ten vychází z tarifních tabulek, které určují základní výši platu podle pracovní pozice a délky praxe <text:span text:style-name="T16">která průměrně sahá na 25 až 30 tisíc Kč </text:span><text:span text:style-name="T17">zato starosta má o 5 tisíc navíc</text:span>. To znamená, že zaměstnanci mají předem stanovený plat, který se postupně zvyšuje podle odpracovaných let. </text:p>
      <text:p text:style-name="P13"/>
      <text:p text:style-name="P13">Kromě základního platu mohou zaměstnanci získat <text:span text:style-name="T17">bonusy</text:span>. Jedná se například o osobní ohodnocení nebo jednorázové odměny. Tyto složky se označují jako pohyblivé, protože nejsou pevně dané a mohou se měnit podle výkonu zaměstnance nebo podle rozhodnutí vedení. Pravidla pro jejich přiznávání jsou stanovena ve vnitřních směrnicích úřadu.</text:p>
      <text:p text:style-name="P13"/>
      <text:p text:style-name="P13">Zaměstnanci mají nárok na dovolenou podle zákoníku práce, přičemž její délka může být upravena interními pravidly nebo kolektivní smlouvou. Ta upravuje i další podmínky, například pracovní dobu nebo benefity.</text:p>
      <text:p text:style-name="P13"/>
      <text:p text:style-name="P13">Výplata mezd probíhá bezhotovostně na bankovní účet zaměstnanců. </text:p>
      <text:p text:style-name="P13"/>
      <text:p text:style-name="P13">Zpracování mezd zajišťuje účetní, která k tomu používá specializovaný počítačový program. V tomto programu se eviduje pracovní doba zaměstnanců, jejich dovolená a další údaje potřebné pro výpočet mzdy. Následně se vypočítá hrubá mzda, ze které se odečítají odvody, jako jsou daně a pojištění, a výsledkem je čistá mzda, která je zaměstnanci vyplacena.</text:p>
      <text:p text:style-name="P24"/>
      <text:p text:style-name="P25" loext:marker-style-name="T18"><text:span text:style-name="T18">EVIDENCE DOCHÁZKY A PŘEHLED DENNÍCH ČINNOSTÍ</text:span><text:span text:style-name="T18"/></text:p>
      <text:p text:style-name="P26" loext:marker-style-name="T19"/>
      <text:p text:style-name="Standard" loext:marker-style-name="T19"><text:span text:style-name="T19"><text:tab/>Jméno:</text:span><text:span text:style-name="T19"/></text:p>
      <text:p text:style-name="P26" loext:marker-style-name="T1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7" loext:marker-style-name="T20"><text:span text:style-name="T20">Datum</text:span><text:span text:style-name="T20"/></text:p>
          </table:table-cell>
          <table:table-cell table:style-name="Table1.A1" office:value-type="string">
            <text:p text:style-name="P27" loext:marker-style-name="T20"><text:span text:style-name="T20">Pracovní doba</text:span><text:span text:style-name="T20"/></text:p>
          </table:table-cell>
          <table:table-cell table:style-name="Table1.A1" office:value-type="string">
            <text:p text:style-name="P27" loext:marker-style-name="T20"><text:span text:style-name="T20">Přehled denních činností</text:span><text:span text:style-name="T20"/></text:p>
          </table:table-cell>
        </table:table-row>
        <table:table-row table:style-name="Table1.2">
          <table:table-cell table:style-name="Table1.A2" office:value-type="string">
            <text:p text:style-name="P28"/>
          </table:table-cell>
          <table:table-cell table:style-name="Table1.B2" office:value-type="string">
            <text:p text:style-name="P28"/>
          </table:table-cell>
          <table:table-cell table:style-name="Table1.C2" office:value-type="string">
            <text:p text:style-name="P28"/>
          </table:table-cell>
        </table:table-row>
        <table:table-row table:style-name="Table1.2">
          <table:table-cell table:style-name="Table1.A3" office:value-type="string">
            <text:p text:style-name="P28"/>
          </table:table-cell>
          <table:table-cell table:style-name="Table1.B3" office:value-type="string">
            <text:p text:style-name="P28"/>
          </table:table-cell>
          <table:table-cell table:style-name="Table1.C3" office:value-type="string">
            <text:p text:style-name="P28"/>
          </table:table-cell>
        </table:table-row>
        <table:table-row table:style-name="Table1.2">
          <table:table-cell table:style-name="Table1.A4" office:value-type="string">
            <text:p text:style-name="P28"/>
          </table:table-cell>
          <table:table-cell table:style-name="Table1.B4" office:value-type="string">
            <text:p text:style-name="P28"/>
          </table:table-cell>
          <table:table-cell table:style-name="Table1.C4" office:value-type="string">
            <text:p text:style-name="P28"/>
          </table:table-cell>
        </table:table-row>
        <table:table-row table:style-name="Table1.2">
          <table:table-cell table:style-name="Table1.A5" office:value-type="string">
            <text:p text:style-name="P28"/>
          </table:table-cell>
          <table:table-cell table:style-name="Table1.B5" office:value-type="string">
            <text:p text:style-name="P28"/>
          </table:table-cell>
          <table:table-cell table:style-name="Table1.C5" office:value-type="string">
            <text:p text:style-name="P28"/>
          </table:table-cell>
        </table:table-row>
        <table:table-row table:style-name="Table1.2">
          <table:table-cell table:style-name="Table1.A6" office:value-type="string">
            <text:p text:style-name="P28"/>
          </table:table-cell>
          <table:table-cell table:style-name="Table1.B6" office:value-type="string">
            <text:p text:style-name="P28"/>
          </table:table-cell>
          <table:table-cell table:style-name="Table1.C6" office:value-type="string">
            <text:p text:style-name="P28"/>
          </table:table-cell>
        </table:table-row>
      </table:table>
      <text:p text:style-name="Standard"/>
      <text:p text:style-name="Standard"/>
      <text:p text:style-name="Standard" loext:marker-style-name="T21"><text:span text:style-name="T21"><text:s text:c="8"/>Podpis: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Adwaita Sans" style:font-size-asian="11pt" style:language-asian="cs" style:country-asian="CZ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cs" fo:country="CZ" style:letter-kerning="false" style:font-name-asian="Adwaita Sans" style:font-size-asian="11pt" style:language-asian="cs" style:country-asian="CZ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color="#000000" loext:opacity="100%"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myContent" style:family="paragraph">
      <style:paragraph-properties fo:line-height="150%">
        <style:tab-stops/>
      </style:paragraph-properties>
      <style:text-properties style:font-name="Times New Roman" fo:font-family="'Times New Roman'" style:font-family-generic="roman" fo:font-size="12pt" style:font-size-asian="12pt" style:font-size-complex="12pt"/>
    </style:style>
    <style:style style:name="myHeader1" style:family="paragraph" style:master-page-name="">
      <style:paragraph-properties fo:line-height="150%" style:page-number="auto">
        <style:tab-stops/>
      </style:paragraph-properties>
      <style:text-properties style:font-name="Times New Roman3" fo:font-family="'Times New Roman'" style:font-style-name="Regular" style:font-family-generic="roman" fo:font-size="16pt" fo:font-weight="normal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xt_20_bubliny_20_Char" style:display-name="Text bubliny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Motiv systému Office">
      <loext:theme-colors loext:name="Kancelář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titulni stranka</dc:title>
    <meta:initial-creator>Mastna</meta:initial-creator>
    <meta:editing-cycles>11</meta:editing-cycles>
    <meta:creation-date>2018-04-20T09:11:00</meta:creation-date>
    <dc:date>2026-05-04T07:23:50.872763032</dc:date>
    <meta:editing-duration>PT10H4M18S</meta:editing-duration>
    <meta:generator>LibreOffice/25.8.6.2$Linux_X86_64 LibreOffice_project/580$Build-2</meta:generator>
    <meta:print-date>2025-12-05T11:14:00</meta:print-date>
    <meta:document-statistic meta:table-count="1" meta:image-count="0" meta:object-count="0" meta:page-count="6" meta:paragraph-count="53" meta:word-count="646" meta:character-count="4179" meta:non-whitespace-character-count="3542"/>
    <meta:user-defined meta:name="AppVersion">16.0000</meta:user-defined>
    <meta:template xlink:type="simple" xlink:actuate="onRequest" xlink:title="Normal" xlink:href=""/>
  </office:meta>
</office:document-meta>
</file>