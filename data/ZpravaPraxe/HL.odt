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margin-top="0in" fo:margin-bottom="0.1626in" style:contextual-spacing="false" fo:line-height="100%" fo:text-align="center" style:justify-single-word="false"/>
    </style:style>
    <style:style style:name="P2" style:family="paragraph" style:parent-style-name="Standard">
      <style:paragraph-properties fo:margin-left="-0.0091in" fo:margin-right="-0.6291in" fo:margin-top="0in" fo:margin-bottom="0.0783in" style:contextual-spacing="false" fo:keep-with-next="always"/>
    </style:style>
    <style:style style:name="P3" style:family="paragraph" style:parent-style-name="Standard">
      <style:paragraph-properties fo:margin-left="-0.0075in" fo:margin-right="-0.6299in" fo:margin-top="0in" fo:margin-bottom="0in" style:contextual-spacing="false" fo:text-align="center" style:justify-single-word="false"/>
    </style:style>
    <style:style style:name="P4" style:family="paragraph" style:parent-style-name="Standard">
      <style:paragraph-properties fo:margin-top="0in" fo:margin-bottom="0.078in" style:contextual-spacing="false"/>
      <style:text-properties style:font-name="Times New Roman1" fo:font-size="12pt" style:font-name-asian="Times New Roman2" style:font-size-asian="12pt" style:font-name-complex="Times New Roman2"/>
    </style:style>
    <style:style style:name="P5" style:family="paragraph" style:parent-style-name="Standard">
      <style:paragraph-properties fo:margin-left="-0.0035in" fo:margin-top="0in" fo:margin-bottom="0.0799in" style:contextual-spacing="false" fo:text-indent="-0.0071in" style:auto-text-indent="false">
        <style:tab-stops>
          <style:tab-stop style:position="2.3626in"/>
        </style:tab-stops>
      </style:paragraph-properties>
    </style:style>
    <style:style style:name="P6" style:family="paragraph" style:parent-style-name="Standard">
      <style:paragraph-properties fo:margin-top="0in" fo:margin-bottom="0.078in" style:contextual-spacing="false">
        <style:tab-stops>
          <style:tab-stop style:position="2.3626in"/>
        </style:tab-stops>
      </style:paragraph-properties>
      <style:text-properties style:font-name="Times New Roman1" fo:font-size="12pt" style:font-name-asian="Times New Roman2" style:font-size-asian="12pt" style:font-name-complex="Times New Roman2"/>
    </style:style>
    <style:style style:name="P7" style:family="paragraph" style:parent-style-name="Standard">
      <style:paragraph-properties>
        <style:tab-stops>
          <style:tab-stop style:position="2.3626in"/>
        </style:tab-stops>
      </style:paragraph-properties>
      <style:text-properties style:font-name="Times New Roman1" fo:font-size="12pt" style:font-name-asian="Times New Roman2" style:font-size-asian="12pt" style:font-name-complex="Times New Roman2"/>
    </style:style>
    <style:style style:name="P8" style:family="paragraph" style:parent-style-name="Standard">
      <style:paragraph-properties fo:margin-top="0in" fo:margin-bottom="0.0799in" style:contextual-spacing="false">
        <style:tab-stops>
          <style:tab-stop style:position="2.3626in"/>
        </style:tab-stops>
      </style:paragraph-properties>
      <style:text-properties style:font-name="Times New Roman1" fo:font-size="12pt" style:font-name-asian="Times New Roman2" style:font-size-asian="12pt" style:font-name-complex="Times New Roman2"/>
    </style:style>
    <style:style style:name="P9" style:family="paragraph" style:parent-style-name="Standard">
      <style:paragraph-properties fo:margin-right="5.3264in" fo:margin-top="0in" fo:margin-bottom="0.0016in" style:contextual-spacing="false" fo:line-height="148%">
        <style:tab-stops>
          <style:tab-stop style:position="2.3626in"/>
        </style:tab-stops>
      </style:paragraph-properties>
      <style:text-properties style:font-name="Times New Roman1" fo:font-size="12pt" style:font-name-asian="Times New Roman2" style:font-size-asian="12pt" style:font-name-complex="Times New Roman2"/>
    </style:style>
    <style:style style:name="P10" style:family="paragraph" style:parent-style-name="Standard">
      <style:paragraph-properties fo:margin-left="-0.0035in" fo:margin-top="0in" fo:margin-bottom="0.0799in" style:contextual-spacing="false" fo:text-indent="-0.0071in" style:auto-text-indent="false">
        <style:tab-stops>
          <style:tab-stop style:position="2.3626in"/>
        </style:tab-stops>
      </style:paragraph-properties>
      <style:text-properties style:font-name="Times New Roman1" fo:font-size="12pt" fo:font-weight="normal" officeooo:rsid="001cda93" officeooo:paragraph-rsid="001cda93" style:font-name-asian="Times New Roman2" style:font-size-asian="12pt" style:font-weight-asian="normal" style:font-name-complex="Times New Roman2" style:font-weight-complex="normal"/>
    </style:style>
    <style:style style:name="P11" style:family="paragraph" style:parent-style-name="myContent">
      <style:text-properties officeooo:paragraph-rsid="002810fc"/>
    </style:style>
    <style:style style:name="P12" style:family="paragraph" style:parent-style-name="myHeader1">
      <style:paragraph-properties fo:break-before="page"/>
      <style:text-properties officeooo:paragraph-rsid="0021719c"/>
    </style:style>
    <style:style style:name="P13" style:family="paragraph" style:parent-style-name="myContent" style:list-style-name="L1"/>
    <style:style style:name="P14" style:family="paragraph" style:parent-style-name="myHeader1">
      <style:paragraph-properties fo:break-before="page"/>
    </style:style>
    <style:style style:name="P15" style:family="paragraph" style:parent-style-name="myContent">
      <style:text-properties officeooo:paragraph-rsid="002825e7"/>
    </style:style>
    <style:style style:name="P16" style:family="paragraph" style:parent-style-name="myContent" style:list-style-name="L2">
      <style:text-properties officeooo:paragraph-rsid="002825e7"/>
    </style:style>
    <style:style style:name="P17" style:family="paragraph" style:parent-style-name="myContent" style:list-style-name="L3">
      <style:text-properties officeooo:paragraph-rsid="002825e7"/>
    </style:style>
    <style:style style:name="P18" style:family="paragraph" style:parent-style-name="myContent" style:list-style-name="L4">
      <style:text-properties officeooo:paragraph-rsid="002825e7"/>
    </style:style>
    <style:style style:name="P19" style:family="paragraph" style:parent-style-name="myContent">
      <style:text-properties officeooo:paragraph-rsid="002dae87"/>
    </style:style>
    <style:style style:name="T1" style:family="text">
      <style:text-properties style:font-name="Times New Roman1" fo:font-size="12pt" fo:font-weight="bold" style:font-name-asian="Times New Roman2" style:font-size-asian="12pt" style:font-weight-asian="bold" style:font-name-complex="Times New Roman2"/>
    </style:style>
    <style:style style:name="T2" style:family="text">
      <style:text-properties style:font-name="Times New Roman1" fo:font-size="16pt" fo:font-weight="bold" style:font-name-asian="Times New Roman2" style:font-size-asian="16pt" style:font-weight-asian="bold" style:font-name-complex="Times New Roman2" style:font-size-complex="16pt"/>
    </style:style>
    <style:style style:name="T3" style:family="text">
      <style:text-properties fo:font-size="16pt" fo:font-weight="bold" style:font-size-asian="16pt" style:font-weight-asian="bold" style:font-size-complex="16pt"/>
    </style:style>
    <style:style style:name="T4" style:family="text">
      <style:text-properties fo:color="#000000" loext:opacity="100%"/>
    </style:style>
    <style:style style:name="T5" style:family="text">
      <style:text-properties style:font-name="Times New Roman1" fo:font-size="12pt" style:font-name-asian="Times New Roman2" style:font-size-asian="12pt" style:font-name-complex="Times New Roman2"/>
    </style:style>
    <style:style style:name="T6" style:family="text">
      <style:text-properties fo:color="#000000" loext:opacity="100%" style:font-name="Times New Roman1" fo:font-size="12pt" officeooo:rsid="001ab506" style:font-name-asian="Times New Roman2" style:font-size-asian="12pt" style:font-name-complex="Times New Roman2"/>
    </style:style>
    <style:style style:name="T7" style:family="text">
      <style:text-properties officeooo:rsid="00312f34"/>
    </style:style>
    <style:style style:name="T8" style:family="text">
      <style:text-properties officeooo:rsid="002f6a2c"/>
    </style:style>
    <style:style style:name="T9" style:family="text">
      <style:text-properties officeooo:rsid="002810fc"/>
    </style:style>
    <style:style style:name="T10" style:family="text">
      <style:text-properties fo:font-size="16pt" officeooo:rsid="0021719c" style:font-size-asian="16pt" style:font-size-complex="16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VOŠ, Obchodní akademie a SZŠ v Domažlicích, Erbenova 184 obor: <text:s/>18-20-M/01 <text:s/>Informační technologie</text:span></text:p>
      <text:p text:style-name="P2"><text:line-break/><text:line-break/><text:line-break/><text:line-break/><text:line-break/><text:line-break/><text:line-break/><text:line-break/><text:line-break/><text:line-break/><text:line-break/></text:p>
      <text:p text:style-name="Caption"/>
      <text:p text:style-name="P3" loext:marker-style-name="T2"><text:span text:style-name="T2">Zpráva z odborné praxe</text:span></text:p>
      <text:p text:style-name="P3" loext:marker-style-name="T3"><text:span text:style-name="T2">2024/2025<text:line-break/><text:line-break/><text:line-break/><text:line-break/><text:line-break/><text:line-break/><text:line-break/><text:line-break/><text:line-break/></text:span></text:p>
      <text:p text:style-name="P4"><text:s/></text:p>
      <text:p text:style-name="P5" loext:marker-style-name="T4"><text:span text:style-name="T5">Místo konání: <text:tab/></text:span><text:span text:style-name="T6">obecní úřad Česká Kubice</text:span></text:p>
      <text:p text:style-name="P6"><text:s/></text:p>
      <text:p text:style-name="P5"><text:span text:style-name="T5">Vedoucí praxe na pracovišti: <text:tab/></text:span><text:span text:style-name="T6">Radek Gerberg</text:span></text:p>
      <text:p text:style-name="P7"><text:s/></text:p>
      <text:p text:style-name="P8">Vedoucí učitel praxe: <text:s/><text:tab/>Ing. Jindra Mastná</text:p>
      <text:p text:style-name="P6"><text:s/></text:p>
      <text:p text:style-name="P5" loext:marker-style-name="T4"><text:span text:style-name="T5">Zpracoval: <text:tab/></text:span><text:span text:style-name="T6">David Halačka</text:span></text:p>
      <text:p text:style-name="P9"><text:s text:c="2"/></text:p>
      <text:p text:style-name="P5"><text:span text:style-name="T5">Klasifikace:</text:span><text:span text:style-name="T1"> </text:span></text:p>
      <text:p text:style-name="P10"/>
      <text:p text:style-name="myHeader1"><text:soft-page-break/><text:span text:style-name="T7">1.</text:span><text:span text:style-name="T8"> </text:span>Charakteristika organizace</text:p>
      <text:p text:style-name="myContent"/>
      <text:p text:style-name="P11">Odbornou praxi jsem vykonával na obecním úřadě Obec Česká Kubice. Jedná se o malou obec v Plzeňském kraji <text:span text:style-name="T9">okresu Domažlice</text:span>, která zajišťuje základní služby a stará se o chod pro obyvatele <text:span text:style-name="T9">České Kubice, Folmavy, Spálence</text:span>.</text:p>
      <text:p text:style-name="myContent"/>
      <text:p text:style-name="myContent">Na první pohled je vidět, že nejde o velkou organizaci, ale právě to má svoje výhody. Lidé se navzájem znají a práce je více různorodá. Zaměstnanci často nedělají jen jednu konkrétní věc, ale řeší více úkolů najednou.</text:p>
      <text:p text:style-name="myContent"/>
      <text:p text:style-name="myContent">Organizační struktura je jednoduchá. V čele je starosta Radek Gerberg, kterému pomáh<text:span text:style-name="T9">ají</text:span> místostarost<text:span text:style-name="T9">ové</text:span> David Kohel <text:span text:style-name="T9">a Radek Strádal</text:span>. Dále zde pracují administrativní pracovníci, účetní a další zaměstnanci, kteří se starají například o údržbu obce.</text:p>
      <text:p text:style-name="myContent"/>
      <text:p text:style-name="myContent">Během praxe jsem si uvědomil, že obecní úřad není jen „kancelář“, ale místo, kde se řeší spousta věcí důležitých pro běžný život lidí – od oprav silnic až po komunikaci s úřady.</text:p>
      <text:p text:style-name="P12"><text:span text:style-name="T10">2. Písemná agenda a její zpracování</text:span></text:p>
      <text:p text:style-name="myContent"/>
      <text:p text:style-name="myContent">Velkou část práce na úřadě tvoří práce s dokumenty. Každý den přichází nové žádosti, zprávy nebo úřední dokumenty, které je potřeba zpracovat.</text:p>
      <text:p text:style-name="myContent"/>
      <text:p text:style-name="myContent">Setkal jsem se například s</text:p>
      <text:list text:style-name="L1">
        <text:list-item>
          <text:p text:style-name="P13">žádostmi od občanů,</text:p>
        </text:list-item>
        <text:list-item>
          <text:p text:style-name="P13">úředními dopisy,</text:p>
        </text:list-item>
        <text:list-item>
          <text:p text:style-name="P13">smlouvami,</text:p>
        </text:list-item>
        <text:list-item>
          <text:p text:style-name="P13">interními dokumenty.</text:p>
        </text:list-item>
      </text:list>
      <text:p text:style-name="myContent"/>
      <text:p text:style-name="myContent">Velká část komunikace probíhá přes datovou schránku <text:span text:style-name="T9">(podatelna@kubice.cz)</text:span>. Nejdřív jsem vůbec nevěděl, jak funguje, ale během praxe jsem pochopil, že je to hlavní způsob komunikace mezi úřady.</text:p>
      <text:p text:style-name="myContent"/>
      <text:p text:style-name="myContent">Dokumenty se musí evidovat, třídit a archivovat. Každý dokument má svoje místo a je důležité, aby se dal kdykoliv dohledat. Právě v tom jsem si uvědomil, jak důležitý je pořádek v administrativě.</text:p>
      <text:p text:style-name="myContent"/>
      <text:p text:style-name="myContent">Měl jsem možnost si některé činnosti vyzkoušet, hlavně jednodušší práci s dokumenty a jejich třídění. I když to může znít jednoduše, ve skutečnosti je potřeba dávat pozor na detaily.</text:p>
      <text:p text:style-name="P14">3. Účetnictví a hospodaření</text:p>
      <text:p text:style-name="P15"/>
      <text:p text:style-name="P15">Obec hospodaří s penězi, které patří všem občanům, takže je potřeba s nimi zacházet opatrně a přehledně.</text:p>
      <text:p text:style-name="P15"/>
      <text:p text:style-name="P15">Dozvěděl jsem se, že příjmy obce tvoří hlavně:</text:p>
      <text:list text:style-name="L2">
        <text:list-item>
          <text:p text:style-name="P16">daně,</text:p>
        </text:list-item>
        <text:list-item>
          <text:p text:style-name="P16">různé dotace,</text:p>
        </text:list-item>
        <text:list-item>
          <text:p text:style-name="P16">poplatky od občanů.</text:p>
        </text:list-item>
      </text:list>
      <text:p text:style-name="P15"/>
      <text:p text:style-name="P15">Naopak peníze se používají například na:</text:p>
      <text:list text:style-name="L3">
        <text:list-item>
          <text:p text:style-name="P17">opravy silnic,</text:p>
        </text:list-item>
        <text:list-item>
          <text:p text:style-name="P17">veřejné osvětlení,</text:p>
        </text:list-item>
        <text:list-item>
          <text:p text:style-name="P17">platy zaměstnanců,</text:p>
        </text:list-item>
        <text:list-item>
          <text:p text:style-name="P17">kulturní akce.</text:p>
        </text:list-item>
      </text:list>
      <text:p text:style-name="P15"/>
      <text:p text:style-name="P15">Měl jsem možnost nahlédnout do základních účetních dokladů a vidět, jak se evidují příjmy a výdaje. Překvapilo mě, kolik věcí se musí zapisovat a kontrolovat.</text:p>
      <text:p text:style-name="P15"/>
      <text:p text:style-name="P15">Zjistil jsem, že účetnictví není jen o číslech, ale hlavně o přehledu a zodpovědnosti.</text:p>
      <text:p text:style-name="P14">4. Mzdy</text:p>
      <text:p text:style-name="myHeader1"/>
      <text:p text:style-name="P15">Mzdy na obecním úřadě fungují jinak než v soukromých firmách. Jsou dané podle tabulek, což znamená, že zaměstnanci mají předem stanovený plat podle své pozice a praxe.</text:p>
      <text:p text:style-name="P15"/>
      <text:p text:style-name="P15">Mzda se skládá z</text:p>
      <text:list text:style-name="L4">
        <text:list-item>
          <text:p text:style-name="P18">základního platu,</text:p>
        </text:list-item>
        <text:list-item>
          <text:p text:style-name="P18">případných odměn,</text:p>
        </text:list-item>
        <text:list-item>
          <text:p text:style-name="P18">osobního ohodnocení.</text:p>
        </text:list-item>
        <text:list-item>
          <text:p text:style-name="P18"/>
        </text:list-item>
      </text:list>
      <text:p text:style-name="P19">Výplata probíhá převodem na účet. O zpracování mezd se stará účetní, která používá speciální program.</text:p>
      <text:p text:style-name="P15"/>
      <text:p text:style-name="P15">Během praxe jsem se dozvěděl, jak se mzdy počítají a co všechno je potřeba evidovat, například pracovní dobu.</text:p>
      <text:p text:style-name="P14">6. Zhodnocení praxe</text:p>
      <text:p text:style-name="P15"/>
      <text:p text:style-name="P15">Praxe pro mě byla zajímavá hlavně tím, že jsem viděl, jak funguje úřad v reálném životě. Do té doby jsem měl jen obecnou představu, ale tady jsem si to mohl vyzkoušet.</text:p>
      <text:p text:style-name="P15"/>
      <text:p text:style-name="P15">Nejvíc mě překvapilo, kolik administrativy je potřeba zvládnout a jak důležitá je přesnost. Stačí malá chyba a může to způsobit problém.</text:p>
      <text:p text:style-name="P15"/>
      <text:p text:style-name="P15">Také jsem si uvědomil, že práce na úřadě není stereotypní. Každý den se řeší něco jiného.</text:p>
      <text:p text:style-name="P15"/>
      <text:p text:style-name="P15">Praxe mi dala lepší představu o tom, jak funguje veřejná správa, a určitě mi pomohla do budoucn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Adwaita Sans" style:font-size-asian="11pt" style:language-asian="cs" style:country-asian="CZ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cs" fo:country="CZ" style:letter-kerning="false" style:font-name-asian="Adwaita Sans" style:font-size-asian="11pt" style:language-asian="cs" style:country-asian="CZ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fo:color="#000000" loext:opacity="100%"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next-style-name="myHeader1" style:class="text">
      <style:paragraph-properties fo:margin-top="0in" fo:margin-bottom="0.0972in" style:contextual-spacing="false" fo:line-height="115%"/>
      <style:text-properties style:font-name="Times New Roman3" fo:font-family="'Times New Roman'" style:font-style-name="Regular" style:font-family-generic="roma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6862in" style:type="center"/>
          <style:tab-stop style:position="5.37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6862in" style:type="center"/>
          <style:tab-stop style:position="5.37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myHeader1" style:family="paragraph" style:master-page-name="">
      <style:paragraph-properties fo:line-height="150%" style:page-number="auto">
        <style:tab-stops/>
      </style:paragraph-properties>
      <style:text-properties style:font-name="Times New Roman3" fo:font-family="'Times New Roman'" style:font-style-name="Regular" style:font-family-generic="roman" fo:font-size="16pt" fo:font-weight="normal" style:font-size-asian="12pt" style:font-size-complex="12pt"/>
    </style:style>
    <style:style style:name="myContent" style:family="paragraph">
      <style:paragraph-properties fo:line-height="150%">
        <style:tab-stops/>
      </style:paragraph-properties>
      <style:text-properties style:font-name="Times New Roman" fo:font-family="'Times New Roman'" style:font-family-generic="roman" fo:font-size="12pt" style:font-size-asian="12pt" style:font-size-complex="12pt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 text:start-value="0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Motiv Office">
      <loext:theme-colors loext:name="Kancelář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0.9835in" fo:margin-right="1.9126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titulni stranka</dc:title>
    <meta:initial-creator>Kubalík</meta:initial-creator>
    <meta:editing-cycles>15</meta:editing-cycles>
    <meta:creation-date>2025-04-04T08:26:00</meta:creation-date>
    <dc:date>2026-04-30T08:03:35.893953011</dc:date>
    <meta:editing-duration>PT4H2M14S</meta:editing-duration>
    <meta:generator>LibreOffice/25.8.6.2$Linux_X86_64 LibreOffice_project/580$Build-2</meta:generator>
    <meta:document-statistic meta:table-count="0" meta:image-count="0" meta:object-count="0" meta:page-count="6" meta:paragraph-count="56" meta:word-count="572" meta:character-count="3583" meta:non-whitespace-character-count="3040"/>
    <meta:user-defined meta:name="AppVersion">16.0000</meta:user-defined>
    <meta:template xlink:type="simple" xlink:actuate="onRequest" xlink:title="Normal" xlink:href=""/>
  </office:meta>
</office:document-meta>
</file>