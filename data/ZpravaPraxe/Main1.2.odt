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automatic-styles>
    <style:style style:name="Table1" style:family="table">
      <style:table-properties style:width="5.7035in" fo:margin-top="0in" fo:margin-bottom="0in" table:align="center" style:writing-mode="page"/>
    </style:style>
    <style:style style:name="Table1.A" style:family="table-column">
      <style:table-column-properties style:column-width="1.0549in"/>
    </style:style>
    <style:style style:name="Table1.B" style:family="table-column">
      <style:table-column-properties style:column-width="1.3264in"/>
    </style:style>
    <style:style style:name="Table1.C" style:family="table-column">
      <style:table-column-properties style:column-width="3.3222in"/>
    </style:style>
    <style:style style:name="Table1.1" style:family="table-row">
      <style:table-row-properties style:min-row-height="0.7875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2" style:family="table-row">
      <style:table-row-properties style:min-row-height="1.1813in" fo:keep-together="auto"/>
    </style:style>
    <style:style style:name="Table1.A2" style:family="table-cell">
      <style:table-cell-properties fo:padding-left="0.075in" fo:padding-right="0.075in" fo:padding-top="0in" fo:padding-bottom="0in" fo:border="0.5pt solid #000000"/>
    </style:style>
    <style:style style:name="Table1.B2" style:family="table-cell">
      <style:table-cell-properties fo:padding-left="0.075in" fo:padding-right="0.075in" fo:padding-top="0in" fo:padding-bottom="0in" fo:border="0.5pt solid #000000"/>
    </style:style>
    <style:style style:name="Table1.C2" style:family="table-cell">
      <style:table-cell-properties fo:padding-left="0.075in" fo:padding-right="0.075in" fo:padding-top="0in" fo:padding-bottom="0in" fo:border="0.5pt solid #000000"/>
    </style:style>
    <style:style style:name="Table1.A3" style:family="table-cell">
      <style:table-cell-properties fo:padding-left="0.075in" fo:padding-right="0.075in" fo:padding-top="0in" fo:padding-bottom="0in" fo:border="0.5pt solid #000000"/>
    </style:style>
    <style:style style:name="Table1.B3" style:family="table-cell">
      <style:table-cell-properties fo:padding-left="0.075in" fo:padding-right="0.075in" fo:padding-top="0in" fo:padding-bottom="0in" fo:border="0.5pt solid #000000"/>
    </style:style>
    <style:style style:name="Table1.C3" style:family="table-cell">
      <style:table-cell-properties fo:padding-left="0.075in" fo:padding-right="0.075in" fo:padding-top="0in" fo:padding-bottom="0in" fo:border="0.5pt solid #000000"/>
    </style:style>
    <style:style style:name="Table1.A4" style:family="table-cell">
      <style:table-cell-properties fo:padding-left="0.075in" fo:padding-right="0.075in" fo:padding-top="0in" fo:padding-bottom="0in" fo:border="0.5pt solid #000000"/>
    </style:style>
    <style:style style:name="Table1.B4" style:family="table-cell">
      <style:table-cell-properties fo:padding-left="0.075in" fo:padding-right="0.075in" fo:padding-top="0in" fo:padding-bottom="0in" fo:border="0.5pt solid #000000"/>
    </style:style>
    <style:style style:name="Table1.C4" style:family="table-cell">
      <style:table-cell-properties fo:padding-left="0.075in" fo:padding-right="0.075in" fo:padding-top="0in" fo:padding-bottom="0in" fo:border="0.5pt solid #000000"/>
    </style:style>
    <style:style style:name="Table1.A5" style:family="table-cell">
      <style:table-cell-properties fo:padding-left="0.075in" fo:padding-right="0.075in" fo:padding-top="0in" fo:padding-bottom="0in" fo:border="0.5pt solid #000000"/>
    </style:style>
    <style:style style:name="Table1.B5" style:family="table-cell">
      <style:table-cell-properties fo:padding-left="0.075in" fo:padding-right="0.075in" fo:padding-top="0in" fo:padding-bottom="0in" fo:border="0.5pt solid #000000"/>
    </style:style>
    <style:style style:name="Table1.C5" style:family="table-cell">
      <style:table-cell-properties fo:padding-left="0.075in" fo:padding-right="0.075in" fo:padding-top="0in" fo:padding-bottom="0in" fo:border="0.5pt solid #000000"/>
    </style:style>
    <style:style style:name="Table1.A6" style:family="table-cell">
      <style:table-cell-properties fo:padding-left="0.075in" fo:padding-right="0.075in" fo:padding-top="0in" fo:padding-bottom="0in" fo:border="0.5pt solid #000000"/>
    </style:style>
    <style:style style:name="Table1.B6" style:family="table-cell">
      <style:table-cell-properties fo:padding-left="0.075in" fo:padding-right="0.075in" fo:padding-top="0in" fo:padding-bottom="0in" fo:border="0.5pt solid #000000"/>
    </style:style>
    <style:style style:name="Table1.C6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margin-left="1.7102in" fo:margin-top="0in" fo:margin-bottom="0.1626in" style:contextual-spacing="false" fo:line-height="100%" fo:text-indent="-0.7783in" style:auto-text-indent="false"/>
    </style:style>
    <style:style style:name="P2" style:family="paragraph" style:parent-style-name="Standard">
      <style:paragraph-properties fo:margin-left="-0.0091in" fo:margin-right="-0.6291in" fo:margin-top="0in" fo:margin-bottom="0.0783in" style:contextual-spacing="false" fo:keep-with-next="always"/>
    </style:style>
    <style:style style:name="P3" style:family="paragraph" style:parent-style-name="Standard">
      <style:paragraph-properties fo:margin-left="-0.0075in" fo:margin-right="-0.6299in" fo:margin-top="0in" fo:margin-bottom="0in" style:contextual-spacing="false" fo:text-align="center" style:justify-single-word="false"/>
    </style:style>
    <style:style style:name="P4" style:family="paragraph" style:parent-style-name="Standard">
      <style:paragraph-properties fo:margin-top="0in" fo:margin-bottom="0.078in" style:contextual-spacing="false"/>
      <style:text-properties style:font-name="Times New Roman1" fo:font-size="12pt" style:font-name-asian="Times New Roman2" style:font-size-asian="12pt" style:font-name-complex="Times New Roman2"/>
    </style:style>
    <style:style style:name="P5" style:family="paragraph" style:parent-style-name="Standard">
      <style:paragraph-properties fo:margin-left="-0.0035in" fo:margin-top="0in" fo:margin-bottom="0.0799in" style:contextual-spacing="false" fo:text-indent="-0.0071in" style:auto-text-indent="false">
        <style:tab-stops>
          <style:tab-stop style:position="2.3626in"/>
        </style:tab-stops>
      </style:paragraph-properties>
    </style:style>
    <style:style style:name="P6" style:family="paragraph" style:parent-style-name="Standard">
      <style:paragraph-properties fo:margin-top="0in" fo:margin-bottom="0.078in" style:contextual-spacing="false">
        <style:tab-stops>
          <style:tab-stop style:position="2.3626in"/>
        </style:tab-stops>
      </style:paragraph-properties>
      <style:text-properties style:font-name="Times New Roman1" fo:font-size="12pt" style:font-name-asian="Times New Roman2" style:font-size-asian="12pt" style:font-name-complex="Times New Roman2"/>
    </style:style>
    <style:style style:name="P7" style:family="paragraph" style:parent-style-name="Standard">
      <style:paragraph-properties>
        <style:tab-stops>
          <style:tab-stop style:position="2.3626in"/>
        </style:tab-stops>
      </style:paragraph-properties>
      <style:text-properties style:font-name="Times New Roman1" fo:font-size="12pt" style:font-name-asian="Times New Roman2" style:font-size-asian="12pt" style:font-name-complex="Times New Roman2"/>
    </style:style>
    <style:style style:name="P8" style:family="paragraph" style:parent-style-name="Standard">
      <style:paragraph-properties fo:margin-top="0in" fo:margin-bottom="0.0799in" style:contextual-spacing="false">
        <style:tab-stops>
          <style:tab-stop style:position="2.3626in"/>
        </style:tab-stops>
      </style:paragraph-properties>
      <style:text-properties style:font-name="Times New Roman1" fo:font-size="12pt" style:font-name-asian="Times New Roman2" style:font-size-asian="12pt" style:font-name-complex="Times New Roman2"/>
    </style:style>
    <style:style style:name="P9" style:family="paragraph" style:parent-style-name="Standard">
      <style:paragraph-properties fo:margin-right="5.3264in" fo:margin-top="0in" fo:margin-bottom="0.0016in" style:contextual-spacing="false" fo:line-height="148%">
        <style:tab-stops>
          <style:tab-stop style:position="2.3626in"/>
        </style:tab-stops>
      </style:paragraph-properties>
      <style:text-properties style:font-name="Times New Roman1" fo:font-size="12pt" style:font-name-asian="Times New Roman2" style:font-size-asian="12pt" style:font-name-complex="Times New Roman2"/>
    </style:style>
    <style:style style:name="P10" style:family="paragraph" style:parent-style-name="Standard">
      <style:paragraph-properties fo:margin-left="-0.0035in" fo:margin-top="0in" fo:margin-bottom="0.0799in" style:contextual-spacing="false" fo:text-indent="-0.0071in" style:auto-text-indent="false">
        <style:tab-stops>
          <style:tab-stop style:position="2.3626in"/>
        </style:tab-stops>
      </style:paragraph-properties>
      <style:text-properties style:font-name="Times New Roman1" fo:font-size="12pt" fo:font-weight="bold" officeooo:paragraph-rsid="001a7852" style:font-name-asian="Times New Roman2" style:font-size-asian="12pt" style:font-weight-asian="bold" style:font-name-complex="Times New Roman2"/>
    </style:style>
    <style:style style:name="P11" style:family="paragraph" style:parent-style-name="myHeader1">
      <style:paragraph-properties fo:break-before="page"/>
    </style:style>
    <style:style style:name="P12" style:family="paragraph" style:parent-style-name="myContent">
      <style:paragraph-properties fo:break-before="page"/>
      <style:text-properties officeooo:paragraph-rsid="000c2e6e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/>
      <style:text-properties style:font-name="Times New Roman1" fo:font-size="14pt" style:font-size-asian="14pt" style:font-name-complex="Times New Roman2" style:font-size-complex="14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Calibri" fo:font-size="11pt" fo:language="cs" fo:country="CZ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style:font-name="Calibri1" fo:font-size="11pt" fo:language="cs" fo:country="CZ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T1" style:family="text">
      <style:text-properties style:font-name="Times New Roman1" fo:font-size="12pt" fo:font-weight="bold" style:font-name-asian="Times New Roman2" style:font-size-asian="12pt" style:font-weight-asian="bold" style:font-name-complex="Times New Roman2"/>
    </style:style>
    <style:style style:name="T2" style:family="text">
      <style:text-properties style:font-name="Times New Roman1" fo:font-size="16pt" fo:font-weight="bold" style:font-name-asian="Times New Roman2" style:font-size-asian="16pt" style:font-weight-asian="bold" style:font-name-complex="Times New Roman2" style:font-size-complex="16pt"/>
    </style:style>
    <style:style style:name="T3" style:family="text">
      <style:text-properties fo:font-size="16pt" fo:font-weight="bold" style:font-size-asian="16pt" style:font-weight-asian="bold" style:font-size-complex="16pt"/>
    </style:style>
    <style:style style:name="T4" style:family="text">
      <style:text-properties fo:color="#92d050" loext:opacity="100%"/>
    </style:style>
    <style:style style:name="T5" style:family="text">
      <style:text-properties style:font-name="Times New Roman1" fo:font-size="12pt" style:font-name-asian="Times New Roman2" style:font-size-asian="12pt" style:font-name-complex="Times New Roman2"/>
    </style:style>
    <style:style style:name="T6" style:family="text">
      <style:text-properties fo:color="#000000" loext:opacity="100%" style:font-name="Times New Roman1" fo:font-size="12pt" officeooo:rsid="000d03e6" style:font-name-asian="Times New Roman2" style:font-size-asian="12pt" style:font-name-complex="Times New Roman2"/>
    </style:style>
    <style:style style:name="T7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8" style:family="text">
      <style:text-properties style:font-name="Times New Roman1" fo:font-size="14pt" style:font-size-asian="14pt" style:font-name-complex="Times New Roman2" style:font-size-complex="14pt"/>
    </style:style>
    <style:style style:name="T9" style:family="text">
      <style:text-properties style:font-name="Times New Roman1" fo:font-size="12pt" fo:font-weight="bold" style:font-size-asian="12pt" style:font-weight-asian="bold" style:font-name-complex="Times New Roman2" style:font-size-complex="12pt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VOŠ, Obchodní akademie a SZŠ v Domažlicích, Erbenova 184 obor: <text:s/>18-20-M/01 <text:s/>Informační technologie</text:span><text:span text:style-name="T1"/></text:p>
      <text:p text:style-name="P2"><text:line-break/><text:line-break/><text:line-break/><text:line-break/><text:line-break/><text:line-break/><text:line-break/><text:line-break/><text:line-break/><text:line-break/><text:line-break/></text:p>
      <text:p text:style-name="Caption"/>
      <text:p text:style-name="P3" loext:marker-style-name="T2"><text:span text:style-name="T2">Zpráva z odborné praxe</text:span><text:span text:style-name="T2"/></text:p>
      <text:p text:style-name="P3" loext:marker-style-name="T3"><text:span text:style-name="T2">2024/2025<text:line-break/><text:line-break/><text:line-break/><text:line-break/><text:line-break/><text:line-break/><text:line-break/><text:line-break/><text:line-break/></text:span><text:span text:style-name="T2"/></text:p>
      <text:p text:style-name="P4"><text:s/></text:p>
      <text:p text:style-name="P5" loext:marker-style-name="T4"><text:span text:style-name="T5">Místo konání: <text:tab/></text:span><text:span text:style-name="T6">obecní úřad Česeká Kubice</text:span></text:p>
      <text:p text:style-name="P6"><text:s/></text:p>
      <text:p text:style-name="P5"><text:span text:style-name="T5">Vedoucí praxe na pracovišti: <text:tab/></text:span><text:span text:style-name="T6">radek Gerberg</text:span></text:p>
      <text:p text:style-name="P7"><text:s/></text:p>
      <text:p text:style-name="P8">Vedoucí učitel praxe: <text:s/><text:tab/>Ing. Jindra Mastná</text:p>
      <text:p text:style-name="P6"><text:s/></text:p>
      <text:p text:style-name="P5" loext:marker-style-name="T4"><text:span text:style-name="T5">Zpracoval: <text:tab/></text:span><text:span text:style-name="T6">David Halačka</text:span></text:p>
      <text:p text:style-name="P9"><text:s text:c="2"/></text:p>
      <text:p text:style-name="P5"><text:span text:style-name="T5">Klasifikace:</text:span><text:span text:style-name="T1"> </text:span></text:p>
      <text:p text:style-name="P10"/>
      <text:p text:style-name="myHeader1"><text:soft-page-break/>1. Charakteristika organizace</text:p>
      <text:p text:style-name="myContent"/>
      <text:p text:style-name="myContent">Praxi jsem absolvoval na obecním úřadě v České Kubici. Před nástupem na praxi jsem měl o fungování úřadu jen základní představu, spíš z pohledu občana, který si jde něco vyřídit. Během praxe jsem ale zjistil, že fungování úřadu je mnohem složitější a zahrnuje více činností, než jsem očekával.</text:p>
      <text:p text:style-name="myContent"/>
      <text:p text:style-name="myContent">Obecní úřad je relativně malé pracoviště, kde nepracuje velké množství zaměstnanců. Právě to ale znamená, že každý pracovník má širší náplň práce a musí zvládat více různých úkolů. Nevýhodou může být větší zátěž, ale na druhou stranu je práce rozmanitější a není monotónní.</text:p>
      <text:p text:style-name="myContent"/>
      <text:p text:style-name="myContent">Na úřadě pracuje starosta, který zastupuje obec a rozhoduje o důležitých věcech, a místostarosta, který mu pomáhá. Dále zde působí administrativní pracovníci a účetní. Každý má svoji roli, ale často si navzájem pomáhají.</text:p>
      <text:p text:style-name="myContent"/>
      <text:p text:style-name="myContent">Během praxe jsem si uvědomil, že úřad neřeší jen administrativní záležitosti, ale hlavně konkrétní problémy lidí. Občané přicházejí s různými žádostmi, někdy jednoduchými, jindy složitějšími. Úřad musí reagovat rychle a správně.</text:p>
      <text:p text:style-name="myContent"/>
      <text:p text:style-name="myContent">Důležitá je také spolupráce s dalšími institucemi, například s krajským úřadem nebo jinými orgány státní správy. Díky tomu jsem pochopil, že obecní úřad není izolovaný, ale je součástí většího systému.</text:p>
      <text:p text:style-name="myContent"/>
      <text:p text:style-name="myContent">Postupně jsem si na prostředí zvykl a začal jsem lépe chápat, jak věci fungují. Celkově na mě úřad působil klidně, ale zároveň bylo vidět, že práce je tam dost.</text:p>
      <text:p text:style-name="P11">2. Písemná agenda a její zpracování</text:p>
      <text:p text:style-name="myContent"/>
      <text:p text:style-name="myContent">Písemná agenda tvoří jednu z nejdůležitějších částí práce na obecním úřadě. Každý den přichází nové dokumenty, které je potřeba zpracovat, evidovat a uložit.</text:p>
      <text:p text:style-name="myContent"/>
      <text:p text:style-name="myContent">Setkal jsem se s různými typy dokumentů, například žádostmi občanů, úředními dopisy, smlouvami nebo interními materiály. Každý dokument musí být správně zařazen, aby se dal později dohledat.</text:p>
      <text:p text:style-name="myContent"/>
      <text:p text:style-name="myContent">Moje hlavní činnost byla skenování dokumentů do elektronické podoby. Šlo o převod papírových dokumentů do digitální formy, což je důležité pro jejich archivaci a další práci. Při skenování bylo potřeba dávat pozor na kvalitu, aby byl dokument čitelný a správně uložený.</text:p>
      <text:p text:style-name="myContent"/>
      <text:p text:style-name="myContent">Kromě toho jsem pomáhal s menšími technickými problémy. Například když nefungovala tiskárna nebo byl problém s počítačem. I když šlo o drobnosti, uvědomil jsem si, že tyto věci mohou výrazně ovlivnit chod práce.</text:p>
      <text:p text:style-name="myContent"/>
      <text:p text:style-name="myContent">Velká část komunikace probíhá přes datovou schránku. Viděl jsem, jak se zprávy přijímají, evidují a zpracovávají. Bylo důležité reagovat včas a správně.</text:p>
      <text:p text:style-name="myContent"/>
      <text:p text:style-name="myContent">Dokumenty se evidují ve spisové službě. Každý dokument má své číslo a kategorii. Díky tomu je možné ho kdykoliv dohledat. Postupně jsem pochopil, že bez tohoto systému by byla práce velmi nepřehledná.</text:p>
      <text:p text:style-name="myContent"/>
      <text:p text:style-name="myContent">Také jsem sledoval komunikaci s občany. Každý měl jiný problém nebo požadavek, a bylo zajímavé vidět, jak se tyto situace řeší. Někdy šlo o jednoduché informace, jindy o složitější záležitosti.</text:p>
      <text:p text:style-name="myContent"/>
      <text:p text:style-name="myContent">Tato část praxe mi ukázala, jak důležitá je organizace práce, pečlivost a schopnost řešit problémy.</text:p>
      <text:p text:style-name="P11">3. Účetnictví a hospodaření</text:p>
      <text:p text:style-name="myContent"/>
      <text:p text:style-name="myContent">Během praxe jsem měl možnost nahlédnout i do oblasti účetnictví a hospodaření obce. I když jsem se této činnosti aktivně neúčastnil, pomohlo mi to pochopit její význam.</text:p>
      <text:p text:style-name="myContent"/>
      <text:p text:style-name="myContent">Obec hospodaří s veřejnými prostředky, což znamená, že musí dodržovat přesná pravidla. Každý příjem a výdaj musí být evidován a doložen.</text:p>
      <text:p text:style-name="myContent"/>
      <text:p text:style-name="myContent">Zjistil jsem, že obec získává peníze z různých zdrojů, například z daní, dotací nebo poplatků od občanů. Tyto prostředky se využívají na provoz obce, opravy, investice nebo platy zaměstnanců.</text:p>
      <text:p text:style-name="myContent"/>
      <text:p text:style-name="myContent">Viděl jsem základní účetní doklady a způsob jejich evidence. Překvapilo mě, kolik detailů je potřeba sledovat a kontrolovat. Každá položka musí být správně zapsaná.</text:p>
      <text:p text:style-name="myContent"/>
      <text:p text:style-name="myContent">Zaujalo mě také plánování rozpočtu. Obec musí dopředu počítat s tím, kolik peněz bude mít a jak je využije. To vyžaduje dobrý přehled a zodpovědnost.</text:p>
      <text:p text:style-name="myContent"/>
      <text:p text:style-name="myContent">Účetnictví mi přišlo náročné hlavně na přesnost. I malá chyba může způsobit problém, proto je důležité vše kontrolovat.</text:p>
      <text:p text:style-name="myContent"/>
      <text:p text:style-name="myContent">Tato zkušenost mi pomohla pochopit, jak důležitá je finanční stránka fungování obce.</text:p>
      <text:p text:style-name="P11">4. Mzdy</text:p>
      <text:p text:style-name="myContent"/>
      <text:p text:style-name="myContent">Během praxe jsem se seznámil i se základy mzdové agendy. Bylo mi vysvětleno, jak funguje systém odměňování na obecním úřadě.</text:p>
      <text:p text:style-name="myContent"/>
      <text:p text:style-name="myContent">Mzdy jsou stanoveny podle platových tabulek. To znamená, že výše platu závisí na pracovní pozici a délce praxe. Tento systém zajišťuje určitou spravedlnost, ale zároveň není tak flexibilní jako v soukromém sektoru.</text:p>
      <text:p text:style-name="myContent"/>
      <text:p text:style-name="myContent">Mzda se skládá ze základního platu a případných odměn. Zaměstnanci mohou dostat i osobní ohodnocení podle své práce.</text:p>
      <text:p text:style-name="myContent"/>
      <text:p text:style-name="myContent">Výplata probíhá převodem na bankovní účet. O zpracování mezd se stará účetní, která používá specializovaný software.</text:p>
      <text:p text:style-name="myContent"/>
      <text:p text:style-name="myContent">Součástí mzdové agendy je také evidence pracovní doby, dovolené a dalších náležitostí. Zjistil jsem, že tato oblast zahrnuje více práce, než jsem si původně myslel.</text:p>
      <text:p text:style-name="myContent"/>
      <text:p text:style-name="myContent">Měl jsem možnost vidět, jak se tyto údaje zapisují a kontrolují. Opět se ukázalo, že je důležitá pečlivost a přesnost.</text:p>
      <text:p text:style-name="P11">5. Zhodnocení praxe</text:p>
      <text:p text:style-name="myContent"/>
      <text:p text:style-name="myContent">Praxe pro mě byla přínosná hlavně tím, že jsem si mohl udělat reálnou představu o fungování obecního úřadu.</text:p>
      <text:p text:style-name="myContent"/>
      <text:p text:style-name="myContent">Nejvíce jsem se naučil v oblasti práce s dokumenty a organizace práce. Uvědomil jsem si, že i zdánlivě jednoduché činnosti vyžadují soustředění a zodpovědnost.</text:p>
      <text:p text:style-name="myContent"/>
      <text:p text:style-name="myContent">Také jsem si vyzkoušel řešení menších technických problémů, což mi přišlo užitečné.</text:p>
      <text:p text:style-name="myContent"/>
      <text:p text:style-name="myContent">Praxe mi pomohla pochopit, jak funguje pracovní prostředí a jaké nároky jsou kladeny na zaměstnance.</text:p>
      <text:p text:style-name="myContent"/>
      <text:p text:style-name="myContent">Celkově hodnotím praxi pozitivně.</text:p>
      <text:p text:style-name="P12"/>
      <text:p text:style-name="P13" loext:marker-style-name="T7"><text:span text:style-name="T7">EVIDENCE DOCHÁZKY A PŘEHLED DENNÍCH ČINNOSTÍ</text:span><text:span text:style-name="T7"/></text:p>
      <text:p text:style-name="P14" loext:marker-style-name="T8"/>
      <text:p text:style-name="Standard" loext:marker-style-name="T8"><text:span text:style-name="T8"><text:tab/>Jméno:</text:span><text:span text:style-name="T8"/></text:p>
      <text:p text:style-name="P14" loext:marker-style-name="T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5" loext:marker-style-name="T9"><text:span text:style-name="T9">Datum</text:span><text:span text:style-name="T9"/></text:p>
          </table:table-cell>
          <table:table-cell table:style-name="Table1.A1" office:value-type="string">
            <text:p text:style-name="P15" loext:marker-style-name="T9"><text:span text:style-name="T9">Pracovní doba</text:span><text:span text:style-name="T9"/></text:p>
          </table:table-cell>
          <table:table-cell table:style-name="Table1.A1" office:value-type="string">
            <text:p text:style-name="P15" loext:marker-style-name="T9"><text:span text:style-name="T9">Přehled denních činností</text:span><text:span text:style-name="T9"/></text:p>
          </table:table-cell>
        </table:table-row>
        <table:table-row table:style-name="Table1.2">
          <table:table-cell table:style-name="Table1.A2" office:value-type="string">
            <text:p text:style-name="P16"/>
          </table:table-cell>
          <table:table-cell table:style-name="Table1.B2" office:value-type="string">
            <text:p text:style-name="P16"/>
          </table:table-cell>
          <table:table-cell table:style-name="Table1.C2" office:value-type="string">
            <text:p text:style-name="P16"/>
          </table:table-cell>
        </table:table-row>
        <table:table-row table:style-name="Table1.2">
          <table:table-cell table:style-name="Table1.A3" office:value-type="string">
            <text:p text:style-name="P16"/>
          </table:table-cell>
          <table:table-cell table:style-name="Table1.B3" office:value-type="string">
            <text:p text:style-name="P16"/>
          </table:table-cell>
          <table:table-cell table:style-name="Table1.C3" office:value-type="string">
            <text:p text:style-name="P16"/>
          </table:table-cell>
        </table:table-row>
        <table:table-row table:style-name="Table1.2">
          <table:table-cell table:style-name="Table1.A4" office:value-type="string">
            <text:p text:style-name="P16"/>
          </table:table-cell>
          <table:table-cell table:style-name="Table1.B4" office:value-type="string">
            <text:p text:style-name="P16"/>
          </table:table-cell>
          <table:table-cell table:style-name="Table1.C4" office:value-type="string">
            <text:p text:style-name="P16"/>
          </table:table-cell>
        </table:table-row>
        <table:table-row table:style-name="Table1.2">
          <table:table-cell table:style-name="Table1.A5" office:value-type="string">
            <text:p text:style-name="P16"/>
          </table:table-cell>
          <table:table-cell table:style-name="Table1.B5" office:value-type="string">
            <text:p text:style-name="P16"/>
          </table:table-cell>
          <table:table-cell table:style-name="Table1.C5" office:value-type="string">
            <text:p text:style-name="P16"/>
          </table:table-cell>
        </table:table-row>
        <table:table-row table:style-name="Table1.2">
          <table:table-cell table:style-name="Table1.A6" office:value-type="string">
            <text:p text:style-name="P16"/>
          </table:table-cell>
          <table:table-cell table:style-name="Table1.B6" office:value-type="string">
            <text:p text:style-name="P16"/>
          </table:table-cell>
          <table:table-cell table:style-name="Table1.C6" office:value-type="string">
            <text:p text:style-name="P16"/>
          </table:table-cell>
        </table:table-row>
      </table:table>
      <text:p text:style-name="Standard"/>
      <text:p text:style-name="Standard"/>
      <text:p text:style-name="Standard" loext:marker-style-name="T10"><text:span text:style-name="T10"><text:s text:c="8"/>Podpis: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cs" fo:country="CZ" style:letter-kerning="false" style:font-name-asian="Adwaita Sans" style:font-size-asian="11pt" style:language-asian="cs" style:country-asian="CZ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cs" fo:country="CZ" style:letter-kerning="false" style:font-name-asian="Adwaita Sans" style:font-size-asian="11pt" style:language-asian="cs" style:country-asian="CZ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fo:color="#000000" loext:opacity="100%"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myContent" style:family="paragraph">
      <style:paragraph-properties fo:line-height="150%">
        <style:tab-stops/>
      </style:paragraph-properties>
      <style:text-properties style:font-name="Times New Roman" fo:font-family="'Times New Roman'" style:font-family-generic="roman" fo:font-size="12pt" style:font-size-asian="12pt" style:font-size-complex="12pt"/>
    </style:style>
    <style:style style:name="myHeader1" style:family="paragraph" style:master-page-name="">
      <style:paragraph-properties fo:line-height="150%" style:page-number="auto">
        <style:tab-stops/>
      </style:paragraph-properties>
      <style:text-properties style:font-name="Times New Roman3" fo:font-family="'Times New Roman'" style:font-style-name="Regular" style:font-family-generic="roman" fo:font-size="16pt" fo:font-weight="normal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xt_20_bubliny_20_Char" style:display-name="Text bubliny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Motiv systému Office">
      <loext:theme-colors loext:name="Kancelář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titulni stranka</dc:title>
    <meta:initial-creator>Mastna</meta:initial-creator>
    <meta:editing-cycles>8</meta:editing-cycles>
    <meta:creation-date>2018-04-20T09:11:00</meta:creation-date>
    <dc:date>2026-05-03T17:32:06.590877003</dc:date>
    <meta:editing-duration>PT5H34M53S</meta:editing-duration>
    <meta:generator>LibreOffice/25.8.6.2$Linux_X86_64 LibreOffice_project/580$Build-2</meta:generator>
    <meta:print-date>2025-12-05T11:14:00</meta:print-date>
    <meta:document-statistic meta:table-count="1" meta:image-count="0" meta:object-count="0" meta:page-count="7" meta:paragraph-count="57" meta:word-count="869" meta:character-count="5734" meta:non-whitespace-character-count="4873"/>
    <meta:user-defined meta:name="AppVersion">16.0000</meta:user-defined>
    <meta:template xlink:type="simple" xlink:actuate="onRequest" xlink:title="Normal" xlink:href=""/>
  </office:meta>
</office:document-meta>
</file>