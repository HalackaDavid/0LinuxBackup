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 style:list-style-name="L1">
      <style:paragraph-properties fo:margin-top="0in" fo:margin-bottom="0.1626in" style:contextual-spacing="false" fo:line-height="100%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normal" officeooo:rsid="001cda93" officeooo:paragraph-rsid="001cda93" style:font-name-asian="Times New Roman2" style:font-size-asian="12pt" style:font-weight-asian="normal" style:font-name-complex="Times New Roman2" style:font-weight-complex="normal"/>
    </style:style>
    <style:style style:name="P11" style:family="paragraph" style:parent-style-name="Text_20_body">
      <style:text-properties style:font-name="Times New Roman" fo:font-size="16pt" style:font-size-asian="16pt" style:font-size-complex="16pt"/>
    </style:style>
    <style:style style:name="P12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13" style:family="paragraph" style:parent-style-name="myHeader1">
      <style:text-properties fo:font-size="16pt" officeooo:rsid="0021719c" officeooo:paragraph-rsid="0021719c" style:font-size-asian="16pt" style:font-size-complex="16pt"/>
    </style:style>
    <style:style style:name="P14" style:family="paragraph" style:parent-style-name="myContent" style:list-style-name="List_20_1"/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1ab506" style:font-name-asian="Times New Roman2" style:font-size-asian="12pt" style:font-name-complex="Times New Roman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319in" fo:text-indent="-0.25in" fo:margin-left="1.431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819in" fo:text-indent="-0.25in" fo:margin-left="1.681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319in" fo:text-indent="-0.25in" fo:margin-left="1.931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1819in" fo:text-indent="-0.25in" fo:margin-left="2.181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319in" fo:text-indent="-0.25in" fo:margin-left="2.431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6819in" fo:text-indent="-0.25in" fo:margin-left="2.681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319in" fo:text-indent="-0.25in" fo:margin-left="2.931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1819in" fo:text-indent="-0.25in" fo:margin-left="3.181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319in" fo:text-indent="-0.25in" fo:margin-left="3.431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6819in" fo:text-indent="-0.25in" fo:margin-left="3.681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 loext:marker-style-name="T1"><text:span text:style-name="T1">VOŠ, Obchodní akademie a SZŠ v Domažlicích, Erbenova 184 obor: <text:s/>18-20-M/01 <text:s/>Informační technologie</text:span></text:p>
        </text:list-item>
      </text:list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><text:soft-page-break/></text:p>
      <text:p text:style-name="myHeader1">1. Charakteristika organizace</text:p>
      <text:p text:style-name="P11"/>
      <text:p text:style-name="myContent">Odbornou praxi jsem vykonával na obecním úřadě Obec Česká Kubice. Jedná se o malou obec v Plzeňském kraji, která zajišťuje základní služby pro místní obyvatele a stará se o chod obce.</text:p>
      <text:p text:style-name="myContent">Na první pohled je vidět, že nejde o velkou organizaci, ale právě to má svoje výhody. Lidé se navzájem znají a práce je více různorodá. Zaměstnanci často nedělají jen jednu konkrétní věc, ale řeší více úkolů najednou.</text:p>
      <text:p text:style-name="myContent">Organizační struktura je jednoduchá. V čele je starosta Radek Gerberg, kterému pomáhá místostarosta David Kohel. Dále zde pracují administrativní pracovníci, účetní a další zaměstnanci, kteří se starají například o údržbu obce.</text:p>
      <text:p text:style-name="myContent">Během praxe jsem si uvědomil, že obecní úřad není jen „kancelář“, ale místo, kde se řeší spousta věcí důležitých pro běžný život lidí – od oprav silnic až po komunikaci s úřady.</text:p>
      <text:p text:style-name="P12"/>
      <text:p text:style-name="P13">2. Písemná agenda a její zpracování</text:p>
      <text:p text:style-name="P13"/>
      <text:p text:style-name="myContent">Velkou část práce na úřadě tvoří práce s dokumenty. Každý den přichází nové žádosti, zprávy nebo úřední dokumenty, které je potřeba zpracovat.</text:p>
      <text:p text:style-name="myContent">Setkal jsem se například s:</text:p>
      <text:list text:style-name="List_20_1">
        <text:list-item>
          <text:p text:style-name="P14">žádostmi od občanů,</text:p>
        </text:list-item>
        <text:list-item>
          <text:p text:style-name="P14">úředními dopisy,</text:p>
        </text:list-item>
        <text:list-item>
          <text:p text:style-name="P14">smlouvami,</text:p>
        </text:list-item>
        <text:list-item>
          <text:p text:style-name="P14">interními dokumenty.</text:p>
        </text:list-item>
      </text:list>
      <text:p text:style-name="myContent">Velká část komunikace probíhá přes datovou schránku. Nejdřív jsem vůbec <text:soft-page-break/>nevěděl, jak funguje, ale během praxe jsem pochopil, že je to hlavní způsob komunikace mezi úřady.</text:p>
      <text:p text:style-name="myContent">Dokumenty se musí evidovat, třídit a archivovat. Každý dokument má svoje místo a je důležité, aby se dal kdykoliv dohledat. Právě v tom jsem si uvědomil, jak důležitý je pořádek v administrativě.</text:p>
      <text:p text:style-name="myContent">Měl jsem možnost si některé činnosti vyzkoušet, hlavně jednodušší práci s dokumenty a jejich třídění. I když to může znít jednoduše, ve skutečnosti je potřeba dávat pozor na detai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next-style-name="myHeader1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6862in" style:type="center"/>
          <style:tab-stop style:position="5.37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myHeader1" style:family="paragraph" style:parent-style-name="Text_20_body">
      <style:paragraph-properties fo:line-height="150%"/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myContent" style:family="paragraph" style:parent-style-name="Text_20_body">
      <style:paragraph-properties fo:line-height="150%"/>
      <style:text-properties style:font-name="Times New Roman" fo:font-family="'Times New Roman'" style:font-family-generic="roman" fo:font-size="12pt" style:font-size-asian="12pt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8</meta:editing-cycles>
    <meta:creation-date>2025-04-04T08:26:00</meta:creation-date>
    <dc:date>2026-04-29T14:49:38.557322938</dc:date>
    <meta:editing-duration>PT3H18M5S</meta:editing-duration>
    <meta:generator>LibreOffice/25.8.6.2$Linux_X86_64 LibreOffice_project/580$Build-2</meta:generator>
    <meta:document-statistic meta:table-count="0" meta:image-count="0" meta:object-count="0" meta:page-count="3" meta:paragraph-count="29" meta:word-count="306" meta:character-count="1972" meta:non-whitespace-character-count="1659"/>
    <meta:user-defined meta:name="AppVersion">16.0000</meta:user-defined>
    <meta:template xlink:type="simple" xlink:actuate="onRequest" xlink:title="Normal" xlink:href=""/>
  </office:meta>
</office:document-meta>
</file>