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margin-left="-0.0102in" fo:margin-top="0in" fo:margin-bottom="0.0799in" style:contextual-spacing="false" fo:text-indent="0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rsid="000d03e6" officeooo:paragraph-rsid="000d03e6" style:font-name-asian="Times New Roman2" style:font-size-asian="12pt" style:font-weight-asian="bold" style:font-name-complex="Times New Roman2"/>
    </style:style>
    <style:style style:name="P12" style:family="paragraph" style:parent-style-name="myHeader1">
      <style:text-properties officeooo:paragraph-rsid="000c2e6e"/>
    </style:style>
    <style:style style:name="P13" style:family="paragraph" style:parent-style-name="myContent">
      <style:text-properties officeooo:paragraph-rsid="000c2e6e"/>
    </style:style>
    <style:style style:name="P14" style:family="paragraph" style:parent-style-name="myHeader1">
      <style:paragraph-properties fo:break-before="page"/>
      <style:text-properties fo:font-size="16pt" officeooo:rsid="0021719c" officeooo:paragraph-rsid="000c2e6e" style:font-size-asian="16pt" style:font-size-complex="16pt"/>
    </style:style>
    <style:style style:name="P15" style:family="paragraph" style:parent-style-name="myContent" style:list-style-name="L1">
      <style:text-properties officeooo:paragraph-rsid="000c2e6e"/>
    </style:style>
    <style:style style:name="P16" style:family="paragraph" style:parent-style-name="myHeader1">
      <style:paragraph-properties fo:break-before="page"/>
      <style:text-properties officeooo:paragraph-rsid="000c2e6e"/>
    </style:style>
    <style:style style:name="P17" style:family="paragraph" style:parent-style-name="myContent" style:list-style-name="L2">
      <style:text-properties officeooo:paragraph-rsid="000c2e6e"/>
    </style:style>
    <style:style style:name="P18" style:family="paragraph" style:parent-style-name="myContent" style:list-style-name="L3">
      <style:text-properties officeooo:paragraph-rsid="000c2e6e"/>
    </style:style>
    <style:style style:name="P19" style:family="paragraph" style:parent-style-name="myContent" style:list-style-name="L4">
      <style:text-properties officeooo:paragraph-rsid="000c2e6e"/>
    </style:style>
    <style:style style:name="P20" style:family="paragraph" style:parent-style-name="myContent">
      <style:paragraph-properties fo:break-before="page"/>
      <style:text-properties officeooo:paragraph-rsid="000c2e6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92d05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f869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style:font-size-asian="14pt" style:font-name-complex="Times New Roman2" style:font-size-complex="14pt"/>
    </style:style>
    <style:style style:name="T14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e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P11"><text:soft-page-break/></text:p>
      <text:p text:style-name="P12"><text:span text:style-name="T7">1.</text:span><text:span text:style-name="T8"> </text:span>Charakteristika organizace</text:p>
      <text:p text:style-name="P13"/>
      <text:p text:style-name="P13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P13"/>
      <text:p text:style-name="P13">Na první pohled je vidět, že nejde o velkou organizaci, ale právě to má svoje výhody. Lidé se navzájem znají a práce je <text:span text:style-name="T10">více </text:span><text:span text:style-name="T11">odlišná</text:span>. Zaměstnanci často nedělají jen jednu konkrétní věc, ale řeší více úkolů najednou.</text:p>
      <text:p text:style-name="P13"/>
      <text:p text:style-name="P13">Organizační struktura je jednoduchá. 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a další zaměstnanci, kteří se starají například o údržbu obce.</text:p>
      <text:p text:style-name="P13"/>
      <text:p text:style-name="P13">Během praxe jsem si uvědomil, že obecní úřad není jen „kancelář“, ale místo, kde se řeší spousta věcí důležitých pro běžný život lidí – od oprav silnic až po komunikaci s úřady.</text:p>
      <text:p text:style-name="P14">2. Písemná agenda a její zpracování</text:p>
      <text:p text:style-name="P13"/>
      <text:p text:style-name="P13">Velkou část práce na úřadě tvoří práce s dokumenty. Každý den přichází nové žádosti, zprávy nebo úřední dokumenty, které je potřeba zpracovat.</text:p>
      <text:p text:style-name="P13"/>
      <text:p text:style-name="P13">Setkal jsem se například s</text:p>
      <text:list text:style-name="L1">
        <text:list-item>
          <text:p text:style-name="P15">žádostmi od občanů</text:p>
        </text:list-item>
        <text:list-item>
          <text:p text:style-name="P15">úředními dopisy</text:p>
        </text:list-item>
        <text:list-item>
          <text:p text:style-name="P15">smlouvami</text:p>
        </text:list-item>
        <text:list-item>
          <text:p text:style-name="P15">interními dokumenty</text:p>
        </text:list-item>
      </text:list>
      <text:p text:style-name="P13"/>
      <text:p text:style-name="P13">Velká část komunikace probíhá přes datovou schránku <text:span text:style-name="T9">(podatelna@kubice.cz)</text:span>. Nejdřív jsem vůbec nevěděl, jak funguje, ale během praxe jsem pochopil, že je to hlavní způsob komunikace mezi úřady.</text:p>
      <text:p text:style-name="P13"/>
      <text:p text:style-name="P13">Dokumenty se musí evidovat, třídit a archivovat. Každý dokument má svoje místo a je důležité, aby se dal kdykoliv dohledat. Právě v tom jsem si uvědomil, jak důležitý je pořádek v administrativě.</text:p>
      <text:p text:style-name="P13"/>
      <text:p text:style-name="P13">Měl jsem možnost si některé činnosti vyzkoušet, hlavně jednodušší práci s dokumenty a jejich třídění. I když to může znít jednoduše, ve skutečnosti je potřeba dávat pozor na detaily.</text:p>
      <text:p text:style-name="P16">3. Účetnictví a hospodaření</text:p>
      <text:p text:style-name="P13"/>
      <text:p text:style-name="P13">Obec hospodaří s penězi, které patří všem občanům, takže je potřeba s nimi zacházet opatrně a přehledně.</text:p>
      <text:p text:style-name="P13"/>
      <text:p text:style-name="P13">Dozvěděl jsem se, že příjmy obce tvoří hlavně:</text:p>
      <text:list text:style-name="L2">
        <text:list-item>
          <text:p text:style-name="P17">daně</text:p>
        </text:list-item>
        <text:list-item>
          <text:p text:style-name="P17">různé dotace</text:p>
        </text:list-item>
        <text:list-item>
          <text:p text:style-name="P17">poplatky od občanů</text:p>
        </text:list-item>
      </text:list>
      <text:p text:style-name="P13"/>
      <text:p text:style-name="P13">Naopak peníze se používají například na:</text:p>
      <text:list text:style-name="L3">
        <text:list-item>
          <text:p text:style-name="P18">opravy silnic</text:p>
        </text:list-item>
        <text:list-item>
          <text:p text:style-name="P18">veřejné osvětlení</text:p>
        </text:list-item>
        <text:list-item>
          <text:p text:style-name="P18">platy zaměstnanců</text:p>
        </text:list-item>
        <text:list-item>
          <text:p text:style-name="P18">kulturní akce</text:p>
        </text:list-item>
      </text:list>
      <text:p text:style-name="P13"/>
      <text:p text:style-name="P13">Měl jsem možnost nahlédnout do základních účetních dokladů a vidět, jak se evidují příjmy a výdaje. Překvapilo mě, kolik věcí se musí zapisovat a kontrolovat.</text:p>
      <text:p text:style-name="P13"/>
      <text:p text:style-name="P13">Zjistil jsem, že účetnictví není jen o číslech, ale hlavně o přehledu a zodpovědnosti.</text:p>
      <text:p text:style-name="P16">4. Mzdy</text:p>
      <text:p text:style-name="P12"/>
      <text:p text:style-name="P13">Mzdy na obecním úřadě fungují jinak než v soukromých firmách. Jsou dané podle tabulek, což znamená, že zaměstnanci mají předem stanovený plat podle své pozice a praxe.</text:p>
      <text:p text:style-name="P13"/>
      <text:p text:style-name="P13">Mzda se skládá z</text:p>
      <text:list text:style-name="L4">
        <text:list-item>
          <text:p text:style-name="P19">základního platu</text:p>
        </text:list-item>
        <text:list-item>
          <text:p text:style-name="P19">případných odměn</text:p>
        </text:list-item>
        <text:list-item>
          <text:p text:style-name="P19">osobního ohodnocení</text:p>
        </text:list-item>
      </text:list>
      <text:p text:style-name="P13"/>
      <text:p text:style-name="P13">Výplata probíhá převodem na účet. O zpracování mezd se stará účetní, která používá speciální program.</text:p>
      <text:p text:style-name="P13"/>
      <text:p text:style-name="P13">Během praxe jsem se dozvěděl, jak se mzdy počítají a co všechno je potřeba evidovat, například pracovní dobu.</text:p>
      <text:p text:style-name="P16">6. Zhodnocení praxe</text:p>
      <text:p text:style-name="P13"/>
      <text:p text:style-name="P13">Praxe pro mě byla zajímavá hlavně tím, že jsem viděl, jak funguje úřad v reálném životě. Do té doby jsem měl jen obecnou představu, ale tady jsem si to mohl vyzkoušet.</text:p>
      <text:p text:style-name="P13"/>
      <text:p text:style-name="P13">Nejvíc mě překvapilo, kolik administrativy je potřeba zvládnout a jak důležitá je přesnost. Stačí malá chyba a může to způsobit problém.</text:p>
      <text:p text:style-name="P13"/>
      <text:p text:style-name="P13">Také jsem si uvědomil, že práce na úřadě není stereotypní. Každý den se řeší něco jiného.</text:p>
      <text:p text:style-name="P13"/>
      <text:p text:style-name="P13">Praxe mi dala lepší představu o tom, jak funguje veřejná správa, a určitě mi pomohla do budoucna.</text:p>
      <text:p text:style-name="P20"/>
      <text:p text:style-name="P21" loext:marker-style-name="T12"><text:span text:style-name="T12">EVIDENCE DOCHÁZKY A PŘEHLED DENNÍCH ČINNOSTÍ</text:span><text:span text:style-name="T12"/></text:p>
      <text:p text:style-name="P22" loext:marker-style-name="T13"/>
      <text:p text:style-name="Standard" loext:marker-style-name="T13"><text:span text:style-name="T13"><text:tab/>Jméno:</text:span><text:span text:style-name="T13"/></text:p>
      <text:p text:style-name="P22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 loext:marker-style-name="T14"><text:span text:style-name="T14">Datum</text:span><text:span text:style-name="T14"/></text:p>
          </table:table-cell>
          <table:table-cell table:style-name="Table1.A1" office:value-type="string">
            <text:p text:style-name="P23" loext:marker-style-name="T14"><text:span text:style-name="T14">Pracovní doba</text:span><text:span text:style-name="T14"/></text:p>
          </table:table-cell>
          <table:table-cell table:style-name="Table1.A1" office:value-type="string">
            <text:p text:style-name="P23" loext:marker-style-name="T14"><text:span text:style-name="T14">Přehled denních činností</text:span><text:span text:style-name="T14"/></text:p>
          </table:table-cell>
        </table:table-row>
        <table:table-row table:style-name="Table1.2"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 table:style-name="Table1.2">
          <table:table-cell table:style-name="Table1.A3" office:value-type="string">
            <text:p text:style-name="P24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4"/>
          </table:table-cell>
        </table:table-row>
        <table:table-row table:style-name="Table1.2">
          <table:table-cell table:style-name="Table1.A4" office:value-type="string">
            <text:p text:style-name="P24"/>
          </table:table-cell>
          <table:table-cell table:style-name="Table1.B4" office:value-type="string">
            <text:p text:style-name="P24"/>
          </table:table-cell>
          <table:table-cell table:style-name="Table1.C4" office:value-type="string">
            <text:p text:style-name="P24"/>
          </table:table-cell>
        </table:table-row>
        <table:table-row table:style-name="Table1.2">
          <table:table-cell table:style-name="Table1.A5" office:value-type="string">
            <text:p text:style-name="P24"/>
          </table:table-cell>
          <table:table-cell table:style-name="Table1.B5" office:value-type="string">
            <text:p text:style-name="P24"/>
          </table:table-cell>
          <table:table-cell table:style-name="Table1.C5" office:value-type="string">
            <text:p text:style-name="P24"/>
          </table:table-cell>
        </table:table-row>
        <table:table-row table:style-name="Table1.2">
          <table:table-cell table:style-name="Table1.A6" office:value-type="string">
            <text:p text:style-name="P24"/>
          </table:table-cell>
          <table:table-cell table:style-name="Table1.B6" office:value-type="string">
            <text:p text:style-name="P24"/>
          </table:table-cell>
          <table:table-cell table:style-name="Table1.C6" office:value-type="string">
            <text:p text:style-name="P24"/>
          </table:table-cell>
        </table:table-row>
      </table:table>
      <text:p text:style-name="Standard"/>
      <text:p text:style-name="Standard"/>
      <text:p text:style-name="Standard" loext:marker-style-name="T15"><text:span text:style-name="T15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6</meta:editing-cycles>
    <meta:creation-date>2018-04-20T09:11:00</meta:creation-date>
    <dc:date>2026-05-02T12:19:06.310779103</dc:date>
    <meta:editing-duration>PT59M24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7" meta:paragraph-count="61" meta:word-count="585" meta:character-count="3675" meta:non-whitespace-character-count="3115"/>
    <meta:user-defined meta:name="AppVersion">16.0000</meta:user-defined>
    <meta:template xlink:type="simple" xlink:actuate="onRequest" xlink:title="Normal" xlink:href=""/>
  </office:meta>
</office:document-meta>
</file>